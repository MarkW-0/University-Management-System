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4000003416448C76C5B50E7DC.png" manifest:media-type="image/png"/>
  <manifest:file-entry manifest:full-path="Pictures/100002010000036C000002B946C9C0452DAD8D29.png" manifest:media-type="image/png"/>
  <manifest:file-entry manifest:full-path="Pictures/100002010000024D00000032B49F63E5D6C85846.png" manifest:media-type="image/png"/>
  <manifest:file-entry manifest:full-path="Pictures/100002010000009A00000027686C6DCF76402D8F.png" manifest:media-type="image/png"/>
  <manifest:file-entry manifest:full-path="Pictures/10000000000000E1000000E148781E37A023259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text-properties fo:font-size="13pt" style:font-size-asian="13pt" style:font-size-complex="13pt"/>
    </style:style>
    <style:style style:name="P3" style:family="paragraph" style:parent-style-name="Standard">
      <loext:graphic-properties draw:fill="solid" draw:fill-color="#ffffff"/>
      <style:paragraph-properties fo:margin-left="0in" fo:margin-right="0in" fo:margin-top="0in" fo:margin-bottom="0in" loext:contextual-spacing="false" fo:line-height="115%" fo:text-align="center" style:justify-single-word="false" fo:orphans="0" fo:widows="0" fo:text-indent="0in" style:auto-text-indent="false" fo:background-color="#ffffff" fo:padding="0in" fo:border="none"/>
    </style:style>
    <style:style style:name="P4" style:family="paragraph" style:parent-style-name="Standard">
      <loext:graphic-properties draw:fill="solid" draw:fill-color="#ffffff"/>
      <style:paragraph-properties fo:margin-left="0in" fo:margin-right="0in" fo:margin-top="0in" fo:margin-bottom="0in" loext:contextual-spacing="false" fo:line-height="115%" fo:orphans="0" fo:widows="0" fo:text-indent="0in" style:auto-text-indent="false" fo:background-color="#ffffff" fo:padding="0in" fo:border="none"/>
    </style:style>
    <style:style style:name="P5"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orphans="0" fo:widows="0" fo:text-indent="0in" style:auto-text-indent="false" fo:background-color="#ffffff" fo:padding="0in" fo:border="none"/>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loext:graphic-properties draw:fill="solid" draw:fill-color="#ffffff"/>
      <style:paragraph-properties fo:margin-left="0in" fo:margin-right="0in" fo:margin-top="0in" fo:margin-bottom="0in" loext:contextual-spacing="false" fo:line-height="115%" fo:orphans="0" fo:widows="0" fo:text-indent="0in" style:auto-text-indent="false" fo:background-color="#ffffff" fo:padding="0in" fo:border="none"/>
      <style:text-properties style:font-name="Times New Roman" fo:font-size="12pt" fo:font-weight="bold" style:font-name-asian="Times New Roman1" style:font-size-asian="12pt" style:font-weight-asian="bold" style:font-name-complex="Times New Roman1" style:font-size-complex="12pt"/>
    </style:style>
    <style:style style:name="P7" style:family="paragraph" style:parent-style-name="Standard" style:master-page-name="Standard">
      <loext:graphic-properties draw:fill="solid" draw:fill-color="#ffffff"/>
      <style:paragraph-properties fo:margin-left="0in" fo:margin-right="0in" fo:margin-top="0in" fo:margin-bottom="0in" loext:contextual-spacing="false" fo:line-height="115%" fo:text-align="center" style:justify-single-word="false" fo:orphans="0" fo:widows="0" fo:text-indent="0in" style:auto-text-indent="false" style:page-number="1" fo:background-color="#ffffff" fo:padding="0in" fo:border="none"/>
    </style:style>
    <style:style style:name="P8" style:family="paragraph" style:parent-style-name="Standard">
      <style:paragraph-properties fo:margin-left="0in" fo:margin-right="0in" fo:text-indent="0in" style:auto-text-indent="false"/>
    </style:style>
    <style:style style:name="P9" style:family="paragraph" style:parent-style-name="Standard">
      <loext:graphic-properties draw:fill="solid" draw:fill-color="#ffffff"/>
      <style:paragraph-properties fo:margin-top="0in" fo:margin-bottom="0in" loext:contextual-spacing="false" fo:line-height="115%" fo:text-align="center" style:justify-single-word="false" fo:orphans="0" fo:widows="0" fo:background-color="#ffffff" fo:padding="0in" fo:border="none"/>
    </style:style>
    <style:style style:name="P10" style:family="paragraph" style:parent-style-name="Standard">
      <loext:graphic-properties draw:fill="solid" draw:fill-color="#ffffff"/>
      <style:paragraph-properties fo:margin-top="0in" fo:margin-bottom="0in" loext:contextual-spacing="false" fo:line-height="115%" fo:orphans="0" fo:widows="0" fo:background-color="#ffffff" fo:padding="0in" fo:border="none"/>
    </style:style>
    <style:style style:name="P11" style:family="paragraph" style:parent-style-name="Standard">
      <loext:graphic-properties draw:fill="solid" draw:fill-color="#ffffff"/>
      <style:paragraph-properties fo:margin-top="0in" fo:margin-bottom="0in" loext:contextual-spacing="false" fo:line-height="115%" fo:text-align="start" style:justify-single-word="false" fo:orphans="0" fo:widows="0" fo:background-color="#ffffff" fo:padding="0in" fo:border="none"/>
      <style:text-properties style:font-name="Times New Roman" fo:font-size="17pt" fo:font-weight="bold" style:font-name-asian="Times New Roman1" style:font-size-asian="17pt" style:font-weight-asian="bold" style:font-name-complex="Times New Roman1" style:font-size-complex="17pt"/>
    </style:style>
    <style:style style:name="P12" style:family="paragraph" style:parent-style-name="Standard">
      <style:paragraph-properties fo:margin-top="0in" fo:margin-bottom="0in" loext:contextual-spacing="false" fo:line-height="115%" fo:orphans="0" fo:widows="0"/>
    </style:style>
    <style:style style:name="P13" style:family="paragraph" style:parent-style-name="Standard">
      <style:paragraph-properties fo:margin-top="0in" fo:margin-bottom="0in" loext:contextual-spacing="false" fo:line-height="100%"/>
    </style:style>
    <style:style style:name="P14" style:family="paragraph" style:parent-style-name="Standard">
      <style:paragraph-properties fo:margin-top="0in" fo:margin-bottom="0in" loext:contextual-spacing="false" fo:line-height="115%" fo:keep-together="auto" fo:orphans="0" fo:widows="0" fo:keep-with-next="auto"/>
    </style:style>
    <style:style style:name="P15" style:family="paragraph" style:parent-style-name="Standard">
      <style:paragraph-properties fo:margin-top="0in" fo:margin-bottom="0in" loext:contextual-spacing="false" fo:line-height="100%" fo:keep-together="auto" fo:orphans="0" fo:widows="0" fo:break-before="auto" fo:break-after="auto" fo:keep-with-next="auto"/>
    </style:style>
    <style:style style:name="P16" style:family="paragraph" style:parent-style-name="Standard">
      <loext:graphic-properties draw:fill="solid" draw:fill-color="#ffffff"/>
      <style:paragraph-properties fo:margin-top="0.0417in" fo:margin-bottom="0in" loext:contextual-spacing="false" fo:line-height="100%" fo:orphans="0" fo:widows="0" fo:background-color="#ffffff" fo:padding="0in" fo:border="none"/>
    </style:style>
    <style:style style:name="P17" style:family="paragraph" style:parent-style-name="Standard">
      <loext:graphic-properties draw:fill="solid" draw:fill-color="#ffffff"/>
      <style:paragraph-properties fo:margin-top="0.0417in" fo:margin-bottom="0in" loext:contextual-spacing="false" fo:line-height="100%" fo:orphans="0" fo:widows="0" fo:background-color="#ffffff" fo:padding="0in" fo:border="none"/>
    </style:style>
    <style:style style:name="P18" style:family="paragraph" style:parent-style-name="Standard">
      <loext:graphic-properties draw:fill="solid" draw:fill-color="#ffffff"/>
      <style:paragraph-properties fo:margin-left="0.25in" fo:margin-right="0in" fo:margin-top="0.0417in" fo:margin-bottom="0in" loext:contextual-spacing="false" fo:line-height="100%" fo:orphans="0" fo:widows="0" fo:text-indent="0in" style:auto-text-indent="false" fo:background-color="#ffffff" fo:padding="0in" fo:border="none"/>
    </style:style>
    <style:style style:name="P19" style:family="paragraph" style:parent-style-name="Standard" style:list-style-name="WWNum1">
      <loext:graphic-properties draw:fill="solid" draw:fill-color="#ffffff"/>
      <style:paragraph-properties fo:margin-left="0.5in" fo:margin-right="0in" fo:margin-top="0in" fo:margin-bottom="0in" loext:contextual-spacing="false" fo:line-height="115%" fo:orphans="0" fo:widows="0" fo:text-indent="-0.25in" style:auto-text-indent="false" fo:background-color="#ffffff" fo:padding="0in" fo:border="none"/>
    </style:style>
    <style:style style:name="P20" style:family="paragraph" style:parent-style-name="Standard" style:list-style-name="WWNum6">
      <loext:graphic-properties draw:fill="solid" draw:fill-color="#ffffff"/>
      <style:paragraph-properties fo:margin-left="0.5in" fo:margin-right="0in" fo:margin-top="0in" fo:margin-bottom="0in" loext:contextual-spacing="false" fo:line-height="115%" fo:orphans="0" fo:widows="0" fo:text-indent="-0.25in" style:auto-text-indent="false" fo:background-color="#ffffff" fo:padding="0in" fo:border="none"/>
    </style:style>
    <style:style style:name="P21"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24" style:family="paragraph" style:parent-style-name="Standard" style:list-style-name="WWNum2">
      <style:paragraph-properties fo:margin-left="0.5in" fo:margin-right="0in" fo:margin-top="0in" fo:margin-bottom="0in" loext:contextual-spacing="false" fo:line-height="100%" fo:keep-together="auto" fo:orphans="0" fo:widows="0" fo:text-indent="-0.25in" style:auto-text-indent="false" fo:break-before="auto" fo:break-after="auto" fo:keep-with-next="auto"/>
    </style:style>
    <style:style style:name="P25"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29" style:family="paragraph" style:parent-style-name="Standard">
      <style:paragraph-properties fo:margin-top="0.1665in" fo:margin-bottom="0.1665in" loext:contextual-spacing="false" fo:line-height="100%"/>
    </style:style>
    <style:style style:name="P30"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31"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32" style:family="paragraph" style:parent-style-name="Standard" style:list-style-name="WWNum5">
      <style:paragraph-properties fo:margin-left="1in" fo:margin-right="0in" fo:margin-top="0in" fo:margin-bottom="0.1665in" loext:contextual-spacing="false" fo:line-height="100%" fo:text-indent="-0.25in" style:auto-text-indent="false"/>
    </style:style>
    <style:style style:name="P33" style:family="paragraph" style:parent-style-name="Standard" style:list-style-name="WWNum4">
      <style:paragraph-properties fo:margin-left="1in" fo:margin-right="0in" fo:margin-top="0in" fo:margin-bottom="0.1665in" loext:contextual-spacing="false" fo:line-height="100%" fo:text-indent="-0.25in" style:auto-text-indent="false"/>
    </style:style>
    <style:style style:name="P34" style:family="paragraph" style:parent-style-name="Standard">
      <style:paragraph-properties fo:keep-together="auto" fo:orphans="0" fo:widows="0" fo:keep-with-next="auto"/>
    </style:style>
    <style:style style:name="P35" style:family="paragraph" style:parent-style-name="Heading_20_2">
      <style:paragraph-properties fo:orphans="0" fo:widows="0"/>
    </style:style>
    <style:style style:name="P36" style:family="paragraph" style:parent-style-name="Heading_20_2">
      <style:paragraph-properties fo:break-before="page"/>
    </style:style>
    <style:style style:name="P37" style:family="paragraph" style:parent-style-name="Heading_20_2">
      <style:paragraph-properties fo:orphans="0" fo:widows="0" fo:break-before="page"/>
    </style:style>
    <style:style style:name="P38" style:family="paragraph" style:parent-style-name="Heading_20_2">
      <style:paragraph-properties fo:keep-together="auto" fo:orphans="0" fo:widows="0" fo:break-before="page" fo:keep-with-next="auto"/>
    </style:style>
    <style:style style:name="P39" style:family="paragraph" style:parent-style-name="Heading_20_2">
      <style:paragraph-properties fo:margin-top="0in" fo:margin-bottom="0in" loext:contextual-spacing="false" fo:line-height="100%" fo:keep-together="auto" fo:orphans="0" fo:widows="0" fo:break-before="auto" fo:break-after="auto" fo:keep-with-next="auto"/>
    </style:style>
    <style:style style:name="P40" style:family="paragraph" style:parent-style-name="Heading_20_2">
      <style:paragraph-properties fo:margin-top="0in" fo:margin-bottom="0in" loext:contextual-spacing="false" fo:line-height="100%"/>
    </style:style>
    <style:style style:name="P41" style:family="paragraph" style:parent-style-name="Heading_20_1">
      <style:paragraph-properties fo:break-before="page"/>
    </style:style>
    <style:style style:name="P42" style:family="paragraph" style:parent-style-name="Heading_20_1">
      <style:paragraph-properties fo:orphans="0" fo:widows="0" fo:break-before="page"/>
    </style:style>
    <style:style style:name="P43" style:family="paragraph" style:parent-style-name="Heading_20_1">
      <style:paragraph-properties fo:margin-top="0in" fo:margin-bottom="0in" loext:contextual-spacing="false" fo:line-height="100%" fo:orphans="0" fo:widows="0" fo:break-before="page"/>
    </style:style>
    <style:style style:name="P44" style:family="paragraph" style:parent-style-name="Heading_20_3">
      <style:text-properties fo:color="#000000"/>
    </style:style>
    <style:style style:name="T1" style:family="text">
      <style:text-properties style:font-name="Times New Roman" fo:font-size="20pt" style:text-underline-style="solid" style:text-underline-width="auto" style:text-underline-color="font-color" fo:font-weight="bold" style:font-name-asian="Times New Roman1" style:font-size-asian="20pt" style:font-weight-asian="bold" style:font-name-complex="Times New Roman1" style:font-size-complex="20pt"/>
    </style:style>
    <style:style style:name="T2" style:family="text">
      <style:text-properties style:font-name="Times New Roman" fo:font-size="17pt" fo:font-weight="bold" style:font-name-asian="Times New Roman1" style:font-size-asian="17pt" style:font-weight-asian="bold" style:font-name-complex="Times New Roman1" style:font-size-complex="17pt"/>
    </style:style>
    <style:style style:name="T3" style:family="text">
      <style:text-properties style:font-name="Times New Roman" fo:font-size="17pt" style:font-name-asian="Times New Roman1" style:font-size-asian="17pt" style:font-name-complex="Times New Roman1" style:font-size-complex="17pt"/>
    </style:style>
    <style:style style:name="T4" style:family="text">
      <style:text-properties style:font-name="Times New Roman" fo:font-size="16pt" fo:font-weight="bold" style:font-name-asian="Times New Roman1" style:font-size-asian="16pt" style:font-weight-asian="bold" style:font-name-complex="Times New Roman1" style:font-size-complex="16pt"/>
    </style:style>
    <style:style style:name="T5" style:family="text">
      <style:text-properties style:font-name="Times New Roman" fo:font-size="16pt" fo:font-weight="bold" style:font-name-asian="Times New Roman1" style:font-size-asian="16pt" style:font-weight-asian="bold" style:font-name-complex="Times New Roman1" style:font-size-complex="16pt" fo:background-color="#ffffff"/>
    </style:style>
    <style:style style:name="T6" style:family="text">
      <style:text-properties style:font-name="Times New Roman" fo:font-size="16pt" style:font-name-asian="Times New Roman1" style:font-size-asian="16pt" style:font-name-complex="Times New Roman1" style:font-size-complex="16pt"/>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style:font-name="Times New Roman" fo:font-size="12pt" fo:font-weight="bold" style:font-name-asian="Times New Roman1" style:font-size-asian="12pt" style:font-weight-asian="bold" style:font-name-complex="Times New Roman1" style:font-size-complex="12pt"/>
    </style:style>
    <style:style style:name="T9" style:family="text">
      <style:text-properties style:text-position="super 58%" style:font-name="Times New Roman" fo:font-size="21pt" fo:font-weight="bold" style:font-name-asian="Times New Roman1" style:font-size-asian="21pt" style:font-weight-asian="bold" style:font-name-complex="Times New Roman1" style:font-size-complex="21pt"/>
    </style:style>
    <style:style style:name="T10" style:family="text">
      <style:text-properties fo:font-weight="bold" style:font-weight-asian="bold"/>
    </style:style>
    <style:style style:name="T11" style:family="text">
      <style:text-properties fo:color="#1155cc" style:text-underline-style="solid" style:text-underline-width="auto" style:text-underline-color="font-color"/>
    </style:style>
    <style:style style:name="T12" style:family="text">
      <style:text-properties fo:font-variant="normal" fo:text-transform="none" fo:color="#1155cc"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14" style:family="text">
      <style:text-properties fo:font-size="13pt" style:font-size-asian="13pt" style:font-size-complex="13pt"/>
    </style:style>
    <style:style style:name="T15" style:family="text">
      <style:text-properties fo:font-size="13pt" fo:font-weight="bold" style:font-size-asian="13pt" style:font-weight-asian="bold" style:font-size-complex="13pt"/>
    </style:style>
    <style:style style:name="T16" style:family="text">
      <style:text-properties fo:color="#000000"/>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style>
    <style:style style:name="T19"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252in, 0in, 0.0307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3189in, 0.3071in, 0.2929in, 0.3071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2563in, 0.2689in, 0.2563in, 0.2929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0138in, 11.3126in, 4.1571in, 0.2929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0138in, 11.6035in, 7.128in, 0.2929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2.0138in, 8.0654in, 5.4661in, 4.441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USER MANUAL REPORT</text:span></text:p>
      <text:p text:style-name="P9"><text:span text:style-name="T2">University of Guelph</text:span><text:span text:style-name="T3"> </text:span></text:p>
      <text:p text:style-name="P9"><text:span text:style-name="T2">School of Engineering </text:span></text:p>
      <text:p text:style-name="P11"/>
      <text:p text:style-name="P9"><draw:frame draw:style-name="fr1" draw:name="image4.png" text:anchor-type="as-char" svg:width="3.6252in" svg:height="3.6252in" draw:z-index="0"><draw:image xlink:href="Pictures/10000000000000E1000000E148781E37A023259A.png" xlink:type="simple" xlink:show="embed" xlink:actuate="onLoad" loext:mime-type="image/png"/><svg:desc>University of Guelph - School of ...</svg:desc></draw:frame></text:p>
      <text:p text:style-name="P11"/>
      <text:p text:style-name="P3"><text:span text:style-name="T2">ENGG*1420 – Object-Oriented Programming</text:span></text:p>
      <text:p text:style-name="P9"><text:span text:style-name="T5">Final Project - University Management System</text:span><text:span text:style-name="T6"> </text:span></text:p>
      <text:p text:style-name="P3"><text:span text:style-name="T4">April 6</text:span><text:span text:style-name="T9">th</text:span><text:span text:style-name="T4">, 2025</text:span><text:span text:style-name="T6"> </text:span></text:p>
      <text:p text:style-name="P5"/>
      <text:p text:style-name="P12"><text:span text:style-name="T10">Group No: 18 </text:span></text:p>
      <text:p text:style-name="P12">Shane D’Souza (1328295)</text:p>
      <text:p text:style-name="P12">Rayyan Ahmed (1295573) </text:p>
      <text:p text:style-name="P12">Aryan Ashraf (1286850) </text:p>
      <text:p text:style-name="P12">Ibrahim Ahmed (1339250)</text:p>
      <text:p text:style-name="P12">Rayyan Quraishi (1334999)</text:p>
      <text:p text:style-name="P12">Mark Waterman (1305036)</text:p>
      <text:p text:style-name="P12"/>
      <text:p text:style-name="P12">source code available at <text:a xlink:type="simple" xlink:href="https://github.com/MarkW-0/University-Management-System" text:style-name="ListLabel_20_55" text:visited-style-name="ListLabel_20_55"><text:span text:style-name="T11">https://github.com/MarkW-0/University-Management-System</text:span></text:a></text:p>
      <text:p text:style-name="P12">This file may be available online at <text:a xlink:type="simple" xlink:href="https://docs.google.com/document/d/1TsaLpf7wxHbFcYYxB5TA74ofSMi3ia1hY2qLPCi5udU/edit?usp=sharing" text:style-name="ListLabel_20_55" text:visited-style-name="ListLabel_20_55"><text:span text:style-name="T11">https://docs.google.com/document/d/1TsaLpf7wxHbFcYYxB5TA74ofSMi3ia1hY2qLPCi5udU/edit?usp=sharing</text:span></text:a></text:p>
      <text:p text:style-name="P12"><text:soft-page-break/></text:p>
      <text:p text:style-name="P41"><text:bookmark text:name="_e7xd3ij0nzju"/>Table of 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text:a xlink:type="simple" xlink:href="#_e7xd3ij0nzju" text:style-name="Index_20_Link" text:visited-style-name="Index_20_Link"><text:span text:style-name="T12">Table of Contents</text:span></text:a></text:p>
          <text:p text:style-name="P16"><text:a xlink:type="simple" xlink:href="#_y49ptd8cx9hp" text:style-name="Index_20_Link" text:visited-style-name="Index_20_Link"><text:span text:style-name="T12">1. Project Overview</text:span></text:a></text:p>
          <text:p text:style-name="P16"><text:a xlink:type="simple" xlink:href="#_bjwz3v9xdm6" text:style-name="Index_20_Link" text:visited-style-name="Index_20_Link"><text:span text:style-name="T12">2 Implementation Steps</text:span></text:a></text:p>
          <text:p text:style-name="P18"><text:a xlink:type="simple" xlink:href="#_3twrt82u8l24" text:style-name="Index_20_Link" text:visited-style-name="Index_20_Link"><text:span text:style-name="T12">2.1 Packages and Classes</text:span></text:a></text:p>
          <text:p text:style-name="P18"><text:a xlink:type="simple" xlink:href="#_wiohbdv45mre" text:style-name="Index_20_Link" text:visited-style-name="Index_20_Link"><text:span text:style-name="T12">2.2 Functions Defined</text:span></text:a></text:p>
          <text:p text:style-name="P18"><text:a xlink:type="simple" xlink:href="#_7hl5owp29xu3" text:style-name="Index_20_Link" text:visited-style-name="Index_20_Link"><text:span text:style-name="T12">2.3 Class Communications</text:span></text:a></text:p>
          <text:p text:style-name="P16"><text:a xlink:type="simple" xlink:href="#_giad9aall18f" text:style-name="Index_20_Link" text:visited-style-name="Index_20_Link"><text:span text:style-name="T12">3 User Interface</text:span></text:a></text:p>
          <text:p text:style-name="P16"><text:a xlink:type="simple" xlink:href="#_723ga63jz2se" text:style-name="Index_20_Link" text:visited-style-name="Index_20_Link"><text:span text:style-name="T12">4 Testing and Debugging</text:span></text:a></text:p>
          <text:p text:style-name="P16"><text:a xlink:type="simple" xlink:href="#_26i98f381xgj" text:style-name="Index_20_Link" text:visited-style-name="Index_20_Link"><text:span text:style-name="T12">5 Conclusion</text:span></text:a></text:p>
          <text:p text:style-name="P16"><text:a xlink:type="simple" xlink:href="#_98besvci7tf3" text:style-name="Index_20_Link" text:visited-style-name="Index_20_Link"><text:span text:style-name="T12">Class Documentation</text:span></text:a></text:p>
          <text:p text:style-name="P18"><text:a xlink:type="simple" xlink:href="#_ij0ajv3mcpxw" text:style-name="Index_20_Link" text:visited-style-name="Index_20_Link"><text:span text:style-name="T12">EditActions</text:span></text:a></text:p>
          <text:p text:style-name="P18"><text:a xlink:type="simple" xlink:href="#_qwvm0zhl4zkv" text:style-name="Index_20_Link" text:visited-style-name="Index_20_Link"><text:span text:style-name="T12">CourseEditActions</text:span></text:a></text:p>
          <text:p text:style-name="P18"><text:a xlink:type="simple" xlink:href="#_gtyc95109l1q" text:style-name="Index_20_Link" text:visited-style-name="Index_20_Link"><text:span text:style-name="T12">EventEditActions</text:span></text:a></text:p>
          <text:p text:style-name="P18"><text:a xlink:type="simple" xlink:href="#_tlj2joxheijl" text:style-name="Index_20_Link" text:visited-style-name="Index_20_Link"><text:span text:style-name="T12">SubjectEditActions</text:span></text:a></text:p>
          <text:p text:style-name="P18"><text:a xlink:type="simple" xlink:href="#_pi0qflcmj09x" text:style-name="Index_20_Link" text:visited-style-name="Index_20_Link"><text:span text:style-name="T12">UserEditActions</text:span></text:a></text:p>
          <text:p text:style-name="P18"><text:a xlink:type="simple" xlink:href="#_1wxnvfhujjym" text:style-name="Index_20_Link" text:visited-style-name="Index_20_Link"><text:span text:style-name="T12">Management</text:span></text:a></text:p>
          <text:p text:style-name="P18"><text:a xlink:type="simple" xlink:href="#_wkkl678cmeqq" text:style-name="Index_20_Link" text:visited-style-name="Index_20_Link"><text:span text:style-name="T12">CourseManagement</text:span></text:a></text:p>
          <text:p text:style-name="P18"><text:a xlink:type="simple" xlink:href="#_3sdnhv6nhh3o" text:style-name="Index_20_Link" text:visited-style-name="Index_20_Link"><text:span text:style-name="T12">EventManagement</text:span></text:a></text:p>
          <text:p text:style-name="P18"><text:a xlink:type="simple" xlink:href="#_ygtsppk2rw42" text:style-name="Index_20_Link" text:visited-style-name="Index_20_Link"><text:span text:style-name="T12">SubjectManagement</text:span></text:a></text:p>
          <text:p text:style-name="P18"><text:a xlink:type="simple" xlink:href="#_jfsm8cjg40bj" text:style-name="Index_20_Link" text:visited-style-name="Index_20_Link"><text:span text:style-name="T12">UserManagement</text:span></text:a></text:p>
          <text:p text:style-name="P18"><text:soft-page-break/><text:a xlink:type="simple" xlink:href="#_1rce9ay60xh" text:style-name="Index_20_Link" text:visited-style-name="Index_20_Link"><text:span text:style-name="T12">LoginScreen</text:span></text:a></text:p>
          <text:p text:style-name="P18"><text:a xlink:type="simple" xlink:href="#_7rsk26726bzr" text:style-name="Index_20_Link" text:visited-style-name="Index_20_Link"><text:span text:style-name="T12">MainLayout</text:span></text:a></text:p>
          <text:p text:style-name="P18"><text:a xlink:type="simple" xlink:href="#_tsjc7txpnv9u" text:style-name="Index_20_Link" text:visited-style-name="Index_20_Link"><text:span text:style-name="T12">Header</text:span></text:a></text:p>
          <text:p text:style-name="P18"><text:a xlink:type="simple" xlink:href="#_mgcwhc7mc7n6" text:style-name="Index_20_Link" text:visited-style-name="Index_20_Link"><text:span text:style-name="T12">Nav</text:span></text:a></text:p>
          <text:p text:style-name="P18"><text:a xlink:type="simple" xlink:href="#_70kh7s77yytr" text:style-name="Index_20_Link" text:visited-style-name="Index_20_Link"><text:span text:style-name="T12">MenuItem</text:span></text:a></text:p>
          <text:p text:style-name="P18"><text:a xlink:type="simple" xlink:href="#_5o51d02hwbd0" text:style-name="Index_20_Link" text:visited-style-name="Index_20_Link"><text:span text:style-name="T12">MetricCard</text:span></text:a></text:p>
          <text:p text:style-name="P18"><text:a xlink:type="simple" xlink:href="#_2gq1n3pj0h13" text:style-name="Index_20_Link" text:visited-style-name="Index_20_Link"><text:span text:style-name="T12">Spacer</text:span></text:a></text:p>
          <text:p text:style-name="P18"><text:a xlink:type="simple" xlink:href="#_dtksbu783q6s" text:style-name="Index_20_Link" text:visited-style-name="Index_20_Link"><text:span text:style-name="T12">Model</text:span></text:a></text:p>
          <text:p text:style-name="P18"><text:a xlink:type="simple" xlink:href="#_317sd7c6hob4" text:style-name="Index_20_Link" text:visited-style-name="Index_20_Link"><text:span text:style-name="T12">Course</text:span></text:a></text:p>
          <text:p text:style-name="P18"><text:a xlink:type="simple" xlink:href="#_51yov5vp1y84" text:style-name="Index_20_Link" text:visited-style-name="Index_20_Link"><text:span text:style-name="T12">Event</text:span></text:a></text:p>
          <text:p text:style-name="P18"><text:a xlink:type="simple" xlink:href="#_e5qu73y6aza9" text:style-name="Index_20_Link" text:visited-style-name="Index_20_Link"><text:span text:style-name="T12">Subject</text:span></text:a></text:p>
          <text:p text:style-name="P18"><text:a xlink:type="simple" xlink:href="#_bcfs57gbowue" text:style-name="Index_20_Link" text:visited-style-name="Index_20_Link"><text:span text:style-name="T12">User</text:span></text:a></text:p>
          <text:p text:style-name="P18"><text:a xlink:type="simple" xlink:href="#_p6zfqihdhhd4" text:style-name="Index_20_Link" text:visited-style-name="Index_20_Link"><text:span text:style-name="T12">Admin</text:span></text:a></text:p>
          <text:p text:style-name="P18"><text:a xlink:type="simple" xlink:href="#_8rkycz954mt1" text:style-name="Index_20_Link" text:visited-style-name="Index_20_Link"><text:span text:style-name="T12">Faculty</text:span></text:a></text:p>
          <text:p text:style-name="P18"><text:a xlink:type="simple" xlink:href="#_nvyosh22n95z" text:style-name="Index_20_Link" text:visited-style-name="Index_20_Link"><text:span text:style-name="T12">Student</text:span></text:a></text:p>
          <text:p text:style-name="P18"><text:a xlink:type="simple" xlink:href="#_t2gdcl8xuwjl" text:style-name="Index_20_Link" text:visited-style-name="Index_20_Link"><text:span text:style-name="T12">ExcelService</text:span></text:a></text:p>
          <text:p text:style-name="P18"><text:a xlink:type="simple" xlink:href="#_kuw06oa5npgu" text:style-name="Index_20_Link" text:visited-style-name="Index_20_Link"><text:span text:style-name="T12">Service</text:span></text:a></text:p>
          <text:p text:style-name="P18"><text:a xlink:type="simple" xlink:href="#_itxucruqzlpi" text:style-name="Index_20_Link" text:visited-style-name="Index_20_Link"><text:span text:style-name="T12">CourseService</text:span></text:a></text:p>
          <text:p text:style-name="P18"><text:a xlink:type="simple" xlink:href="#_xcs08spo3xv7" text:style-name="Index_20_Link" text:visited-style-name="Index_20_Link"><text:span text:style-name="T12">EventService</text:span></text:a></text:p>
          <text:p text:style-name="P18"><text:a xlink:type="simple" xlink:href="#_vxp1o06ge9z4" text:style-name="Index_20_Link" text:visited-style-name="Index_20_Link"><text:span text:style-name="T12">SubjectService</text:span></text:a></text:p>
          <text:p text:style-name="P18"><text:a xlink:type="simple" xlink:href="#_593ykqpijqfr" text:style-name="Index_20_Link" text:visited-style-name="Index_20_Link"><text:span text:style-name="T12">UserService</text:span></text:a></text:p>
          <text:p text:style-name="P18"><text:soft-page-break/><text:a xlink:type="simple" xlink:href="#_r883q22k3qse" text:style-name="Index_20_Link" text:visited-style-name="Index_20_Link"><text:span text:style-name="T12">Role</text:span></text:a></text:p>
          <text:p text:style-name="P18"><text:a xlink:type="simple" xlink:href="#_ggs8cyccskr" text:style-name="Index_20_Link" text:visited-style-name="Index_20_Link"><text:span text:style-name="T12">Launcher</text:span></text:a></text:p>
          <text:p text:style-name="P18"><text:a xlink:type="simple" xlink:href="#_wn2ikl8aco5t" text:style-name="Index_20_Link" text:visited-style-name="Index_20_Link"><text:span text:style-name="T12">MainApp</text:span></text:a></text:p>
        </text:index-body>
      </text:table-of-content>
      <text:p text:style-name="P14"/>
      <text:p text:style-name="P41"><text:bookmark text:name="_y49ptd8cx9hp"/>1. Project Overview</text:p>
      <text:p text:style-name="P10"><text:span text:style-name="T7">The University Management System is designed to simplify the administrative tasks of managing students, faculty, courses, subjects, and events within a university environment. It ensures </text:span>the <text:span text:style-name="T7">secure handling of sensitive data through an intuitive graphical user interface developed using JavaFX.</text:span></text:p>
      <text:p text:style-name="P10"><text:span text:style-name="T7">The system is built around role-based access control, offering two primary user roles:</text:span></text:p>
      <text:list xml:id="list1945307697" text:style-name="WWNum1">
        <text:list-item>
          <text:p text:style-name="P19"><text:span text:style-name="T8">ADMIN:</text:span><text:span text:style-name="T7"> Has full permissions, including adding, editing, deleting, and viewing data across all modules.<text:line-break/></text:span></text:p>
        </text:list-item>
        <text:list-item>
          <text:p text:style-name="P19"><text:span text:style-name="T8">USER (Students &amp; Faculty):</text:span><text:span text:style-name="T7"> Limited to viewing information, with additional functionalities such as registering for events, managing personal profiles, viewing grades, enrolled courses, and faculty-specific views.</text:span></text:p>
        </text:list-item>
      </text:list>
      <text:p text:style-name="P4"><text:span text:style-name="T7">This is represented through the User class’s “role” attribute</text:span>,<text:span text:style-name="T7"> which is an enum consisting of ADMIN, FACULTY, STUDENT, and USER.</text:span></text:p>
      <text:p text:style-name="P10"><text:span text:style-name="T7">The core modules of the system include:</text:span></text:p>
      <text:list xml:id="list1083759247" text:style-name="WWNum6">
        <text:list-item>
          <text:p text:style-name="P20"><text:span text:style-name="T8">Subject Management:</text:span><text:span text:style-name="T7"> Manage subjects offered by the university, essential for structuring courses.<text:line-break/></text:span></text:p>
        </text:list-item>
        <text:list-item>
          <text:p text:style-name="P20"><text:span text:style-name="T8">Course Management:</text:span><text:span text:style-name="T7"> Create and manage detailed course information, including faculty assignments, schedules, and student enrollments.<text:line-break/></text:span></text:p>
        </text:list-item>
        <text:list-item>
          <text:p text:style-name="P20"><text:span text:style-name="T8">Student Management:</text:span><text:span text:style-name="T7"> Store and handle comprehensive student records, including enrollment status, academic progress, and tuition management.<text:line-break/></text:span></text:p>
        </text:list-item>
        <text:list-item>
          <text:p text:style-name="P20"><text:span text:style-name="T8">Faculty Management:</text:span><text:span text:style-name="T7"> Manage faculty profiles, course assignments, and research interests.<text:line-break/></text:span></text:p>
        </text:list-item>
        <text:list-item>
          <text:p text:style-name="P20"><text:span text:style-name="T8">Event Management:</text:span><text:span text:style-name="T7"> Schedule and oversee university events, providing registration and participant management features.<text:line-break/></text:span></text:p>
        </text:list-item>
      </text:list>
      <text:p text:style-name="P10"><text:span text:style-name="T7">Authentication mechanisms ensure </text:span>users see<text:span text:style-name="T7"> only relevant information and functionalities based on their role. The </text:span>program <text:span text:style-name="T7">incorporates validation, error handling, and data consistency checks to maintain reliability and user trust throughout the platform​.</text:span></text:p>
      <text:p text:style-name="P1"/>
      <text:p text:style-name="P42"><text:bookmark text:name="_bjwz3v9xdm6"/>2 Implementation Steps</text:p>
      <text:p text:style-name="P35"><text:bookmark text:name="_3twrt82u8l24"/>2.1 Packages and Classes</text:p>
      <text:p text:style-name="P29"><text:span text:style-name="T14">Our project is organized into several logical packages:</text:span></text:p>
      <text:list xml:id="list520205727" text:style-name="WWNum5">
        <text:list-item>
          <text:p text:style-name="P25"><text:span text:style-name="T15">GUI Package:<text:line-break/></text:span><text:span text:style-name="T14"> This package is responsible for the user interface. In addition to Java classes that control behavior, it includes several FXML files that define the layout of various screens. These FXML files include:<text:line-break/></text:span></text:p>
          <text:list>
            <text:list-item>
              <text:p text:style-name="P30"><text:span text:style-name="T15">LoginScreen.fxml</text:span><text:span text:style-name="T14"> – Defines the login interface.<text:line-break/></text:span></text:p>
            </text:list-item>
            <text:list-item>
              <text:p text:style-name="P30"><text:span text:style-name="T15">CourseManagement.fxml, EventManagement.fxml, SubjectManagement.fxml, UserManagement.fxml</text:span><text:span text:style-name="T14"> – Layouts for the respective management views.<text:line-break/></text:span></text:p>
            </text:list-item>
            <text:list-item>
              <text:p text:style-name="P30"><text:span text:style-name="T15">Header.fxml, MenuItem.fxml, MetricCard.fxml</text:span><text:span text:style-name="T14"> – Define the structure and styling of the header, navigation items, and metric display cards.<text:line-break/></text:span></text:p>
            </text:list-item>
          </text:list>
        </text:list-item>
        <text:list-item>
          <text:p text:style-name="P21"><text:span text:style-name="T14">The GUI package also contains classes such as:<text:line-break/></text:span></text:p>
          <text:list>
            <text:list-item>
              <text:p text:style-name="P30"><text:span text:style-name="T15">MainLayout, Header, Nav, MenuItem, MetricCard, Spacer:</text:span><text:span text:style-name="T14"> Build and manage the overall window layout and navigation.<text:line-break/></text:span></text:p>
            </text:list-item>
            <text:list-item>
              <text:p text:style-name="P30"><text:span text:style-name="T15">LoginScreen:</text:span><text:span text:style-name="T14"> Manages user authentication.<text:line-break/></text:span></text:p>
            </text:list-item>
            <text:list-item>
              <text:p text:style-name="P30"><text:span text:style-name="T15">Management and its subclasses (CourseManagement, EventManagement, SubjectManagement, UserManagement):</text:span><text:span text:style-name="T14"> Provide views for managing data.<text:line-break/></text:span></text:p>
            </text:list-item>
            <text:list-item>
              <text:p text:style-name="P30"><text:span text:style-name="T15">EditActions and its subclasses (CourseEditActions, EventEditActions, SubjectEditActions, UserEditActions):</text:span><text:span text:style-name="T14"> Supply row specific actions (edit/delete) for TableViews.<text:line-break/></text:span></text:p>
            </text:list-item>
          </text:list>
        </text:list-item>
        <text:list-item>
          <text:p text:style-name="P21"><text:span text:style-name="T15">Models Package:<text:line-break/></text:span><text:span text:style-name="T14"> Contains the data entity classes:<text:line-break/></text:span></text:p>
          <text:list>
            <text:list-item>
              <text:p text:style-name="P30"><text:span text:style-name="T15">Model (abstract):</text:span><text:span text:style-name="T14"> Base class for all data objects (requires an isEqual method).<text:line-break/></text:span></text:p>
            </text:list-item>
            <text:list-item>
              <text:p text:style-name="P30"><text:span text:style-name="T15">Course, Event, Subject, User:</text:span><text:span text:style-name="T14"> Main data types.<text:line-break/></text:span></text:p>
            </text:list-item>
            <text:list-item>
              <text:p text:style-name="P30"><text:span text:style-name="T15">User Subclasses (Admin, Faculty, Student):</text:span><text:span text:style-name="T14"> Extend User with role-specific fields.<text:line-break/></text:span></text:p>
            </text:list-item>
            <text:list-item>
              <text:p text:style-name="P30"><text:span text:style-name="T15">Role (enum):</text:span><text:span text:style-name="T14"> Lists possible user roles: ADMIN, FACULTY, STUDENT, USER.<text:line-break/></text:span></text:p>
            </text:list-item>
          </text:list>
        </text:list-item>
        <text:list-item>
          <text:p text:style-name="P21"><text:span text:style-name="T15">Services Package:<text:line-break/></text:span><text:span text:style-name="T14"> Handles data operations and persistence:<text:line-break/></text:span></text:p>
          <text:list>
            <text:list-item>
              <text:p text:style-name="P30"><text:span text:style-name="T15">ExcelService:</text:span><text:span text:style-name="T14"> Uses Apache POI to load data from “UMS_Data.xlsx.”<text:line-break/></text:span></text:p>
            </text:list-item>
            <text:list-item>
              <text:p text:style-name="P30"><text:span text:style-name="T15">Service (generic):</text:span><text:span text:style-name="T14"> Provides CRUD operations for models.<text:line-break/></text:span></text:p>
            </text:list-item>
            <text:list-item>
              <text:p text:style-name="P30"><text:span text:style-name="T15">Specific Services (CourseService, EventService, SubjectService, UserService):</text:span><text:span text:style-name="T14"> Manage operations for each model type.<text:line-break/></text:span></text:p>
            </text:list-item>
          </text:list>
        </text:list-item>
        <text:list-item>
          <text:p text:style-name="P21"><text:soft-page-break/><text:span text:style-name="T15">Application Package:<text:line-break/></text:span><text:span text:style-name="T14"> Classes related to application startup and scene management:<text:line-break/></text:span></text:p>
          <text:list>
            <text:list-item>
              <text:p text:style-name="P30"><text:span text:style-name="T15">MainApp:</text:span><text:span text:style-name="T14"> This initializes services, handles scene switching, and sets up the primary Stage.<text:line-break/></text:span></text:p>
            </text:list-item>
            <text:list-item>
              <text:p text:style-name="P32"><text:span text:style-name="T15">Launcher:</text:span><text:span text:style-name="T14"> Con</text:span>tains the main method and starts the application.</text:p>
            </text:list-item>
          </text:list>
        </text:list-item>
      </text:list>
      <text:p text:style-name="Standard"/>
      <text:p text:style-name="P37"><text:bookmark text:name="_wiohbdv45mre"/>2.2 Functions Defined</text:p>
      <text:p text:style-name="P29"><text:span text:style-name="T14">The UMS system implements several functions:</text:span></text:p>
      <text:list xml:id="list1319842463" text:style-name="WWNum4">
        <text:list-item>
          <text:p text:style-name="P26"><text:span text:style-name="T14">Data Management:<text:line-break/></text:span></text:p>
          <text:list>
            <text:list-item>
              <text:p text:style-name="P31"><text:span text:style-name="T15">Create, Retrieve, Update, and Delete (CRUD) Operations:</text:span><text:span text:style-name="T14"> Each service class provides methods to create, read, update, and delete data.<text:line-break/></text:span></text:p>
            </text:list-item>
            <text:list-item>
              <text:p text:style-name="P31"><text:span text:style-name="T15">Excel Integration:</text:span><text:span text:style-name="T14"> Data is loaded from “UMS_Data.xlsx” via ExcelService, ensuring consistent initial data.<text:line-break/></text:span></text:p>
            </text:list-item>
          </text:list>
        </text:list-item>
        <text:list-item>
          <text:p text:style-name="P22"><text:span text:style-name="T14">User Interface Functions:<text:line-break/></text:span></text:p>
          <text:list>
            <text:list-item>
              <text:p text:style-name="P31"><text:span text:style-name="T15">Dynamic View Switching:</text:span><text:span text:style-name="T14"> The MainLayout and MenuItem classes allow seamless transitions between views.<text:line-break/></text:span></text:p>
            </text:list-item>
            <text:list-item>
              <text:p text:style-name="P31"><text:span text:style-name="T15">Form Dialogs:</text:span><text:span text:style-name="T14"> Each management view offers dialogs for adding or editing data, with proper input validation.<text:line-break/></text:span></text:p>
            </text:list-item>
            <text:list-item>
              <text:p text:style-name="P31"><text:span text:style-name="T15">Role-Based Display:</text:span><text:span text:style-name="T14"> The interface adjusts to show additional features (like edit/delete buttons) only for ADMIN users.<text:line-break/></text:span></text:p>
            </text:list-item>
          </text:list>
        </text:list-item>
        <text:list-item>
          <text:p text:style-name="P22"><text:span text:style-name="T14">Authentication:<text:line-break/></text:span></text:p>
          <text:list>
            <text:list-item>
              <text:p text:style-name="P33"><text:span text:style-name="T15">LoginScreen:</text:span><text:span text:style-name="T14"> Validates user credentials against the UserService data. On successful login, the MainApp updates the current user and displays the MainLayout with appropriate permissions.</text:span></text:p>
            </text:list-item>
          </text:list>
        </text:list-item>
      </text:list>
      <text:p text:style-name="Standard"/>
      <text:p text:style-name="P39"><text:bookmark text:name="_7hl5owp29xu3"/>2.3 Class Communications</text:p>
      <text:p text:style-name="P15"><text:span text:style-name="T14">The various components of the UMS interact in the following ways:</text:span></text:p>
      <text:list xml:id="list1977303329" text:style-name="WWNum2">
        <text:list-item>
          <text:p text:style-name="P24"><text:span text:style-name="T15">GUI and Services:<text:line-break/></text:span><text:span text:style-name="T14"> Management views pull data from their corresponding service classes. When users add, edit, or delete an item, the view calls the service’s method to update the data, which then refreshes the display.<text:line-break/></text:span></text:p>
        </text:list-item>
        <text:list-item>
          <text:p text:style-name="P24"><text:span text:style-name="T15">Data Flow:<text:line-break/></text:span><text:span text:style-name="T14"> At startup, ExcelService loads data from the Excel file. This data is then distributed to the appropriate services, which feed the GUI components.<text:line-break/></text:span></text:p>
        </text:list-item>
        <text:list-item>
          <text:p text:style-name="P24"><text:span text:style-name="T15">Authentication Flow:<text:line-break/></text:span><text:span text:style-name="T14"> The LoginScreen iterates through users in the UserService to verify credentials. A successful login triggers a switch to the MainLayout, which tailors its interface based on the user’s role.<text:line-break/></text:span></text:p>
        </text:list-item>
        <text:list-item>
          <text:p text:style-name="P24"><text:span text:style-name="T15">Navigation and Event Handling:<text:line-break/></text:span><text:span text:style-name="T14"> The Nav and MenuItem classes manage the navigation through the system. When a menu item is clicked, the main content area in MainLayout is updated with the selected view. EditActions and its subclasses also manage row-specific events (such as editing or deleting) by opening dialogs to collect user input before updating the service layer.</text:span></text:p>
        </text:list-item>
      </text:list>
      <text:p text:style-name="P8"/>
      <text:p text:style-name="P42"><text:bookmark text:name="_giad9aall18f"/>3 User Interface</text:p>
      <text:p text:style-name="Standard"><text:span text:style-name="T14">The UMS user interface is designed with simplicity and clarity in mind:</text:span></text:p>
      <text:p text:style-name="P2"/>
      <text:p text:style-name="Standard"><text:span text:style-name="T14">Overall Layout:</text:span></text:p>
      <text:p text:style-name="Standard"><text:span text:style-name="T14">The MainLayout class arranges the application into three main sections:</text:span></text:p>
      <text:p text:style-name="P2"/>
      <text:p text:style-name="Standard"><text:span text:style-name="T14">Header: Displays user information and includes a logout button.</text:span></text:p>
      <text:p text:style-name="P2"/>
      <text:p text:style-name="Standard"><text:span text:style-name="T14">Navigation Menu: A collapsible side pane (handled by Nav and MenuItem) provides access to different modules.</text:span></text:p>
      <text:p text:style-name="P2"/>
      <text:p text:style-name="Standard"><text:span text:style-name="T14">Content Area: The central pane dynamically displays management views (such as dashboards or data tables).</text:span></text:p>
      <text:p text:style-name="P2"/>
      <text:p text:style-name="Standard"><text:span text:style-name="T14">Navigation:</text:span></text:p>
      <text:p text:style-name="Standard"><text:span text:style-name="T14">The navigation menu lets users easily switch between different modules. The available options depend on the user’s role—for example, ADMIN users have access to additional management functions.</text:span></text:p>
      <text:p text:style-name="P2"/>
      <text:p text:style-name="Standard"><text:span text:style-name="T14">Management Views:</text:span></text:p>
      <text:p text:style-name="Standard"><text:span text:style-name="T14">Each module (courses, events, subjects, users) is managed via a TableView that displays current data. ADMIN users have an extra “Actions” column, which provides buttons to edit or delete entries.</text:span></text:p>
      <text:p text:style-name="P2"/>
      <text:p text:style-name="Standard"><text:span text:style-name="T14">Dialogs:</text:span></text:p>
      <text:p text:style-name="Standard"><text:span text:style-name="T14">Custom dialogs (which solely use javaFX) are used for adding or editing data. These dialogs are laid out using GridPane for clarity, and they include validation to ensure correct input.</text:span></text:p>
      <text:p text:style-name="P2"/>
      <text:p text:style-name="Standard"><text:soft-page-break/><text:span text:style-name="T14">Styling:</text:span></text:p>
      <text:p text:style-name="Standard"><text:span text:style-name="T14">A CSS stylesheet (style.css) is loaded at runtime, ensuring a consistent look and feel across the application.</text:span></text:p>
      <text:p text:style-name="Standard"/>
      <text:p text:style-name="P42"><text:bookmark text:name="_723ga63jz2se"/>4 Testing and Debugging</text:p>
      <text:p text:style-name="Standard"><text:span text:style-name="T14">Our team performed extensive testing to ensure the system is robust and user-friendly:</text:span></text:p>
      <text:p text:style-name="P2"/>
      <text:p text:style-name="Standard"><text:span text:style-name="T14">Service Testing:</text:span></text:p>
      <text:p text:style-name="Standard"><text:span text:style-name="T14">Each service (CourseService, EventService, etc.) was tested to verify that its CRUD operations work correctly and that data loaded from Excel is accurate.</text:span></text:p>
      <text:p text:style-name="P2"/>
      <text:p text:style-name="Standard"><text:span text:style-name="T14">User Interface Testing:</text:span></text:p>
      <text:p text:style-name="Standard"><text:span text:style-name="T14">We conducted manual tests to confirm that TableViews update properly after data changes and that dialogs validate user input effectively. We also verified that error messages are displayed when expected.</text:span></text:p>
      <text:p text:style-name="P2"/>
      <text:p text:style-name="Standard"><text:span text:style-name="T14">Role-Based Testing:</text:span></text:p>
      <text:p text:style-name="Standard"><text:span text:style-name="T14">By simulating different user roles, we confirmed that the UI only shows the appropriate options for each role (e.g., only ADMIN users see the “Add” button and edit/delete options).</text:span></text:p>
      <text:p text:style-name="P2"/>
      <text:p text:style-name="Standard"><text:span text:style-name="T14">Error Handling:</text:span></text:p>
      <text:p text:style-name="Standard"><text:span text:style-name="T14">Our testing included scenarios with invalid input to ensure that the system responds with clear alerts and confirmation dialogs, helping users avoid mistakes.</text:span></text:p>
      <text:p text:style-name="P2"/>
      <text:p text:style-name="Standard"><text:span text:style-name="T14">Debugging:</text:span></text:p>
      <text:p text:style-name="Standard"><text:span text:style-name="T14">JavaFX debugging tools and console logs in both the GUI and service layers were used to monitor data flow and ensure that scene transitions and event handling occur smoothly.</text:span></text:p>
      <text:p text:style-name="Standard"/>
      <text:p text:style-name="P42"><text:bookmark text:name="_26i98f381xgj"/>5 Conclusion</text:p>
      <text:p text:style-name="P29"><text:span text:style-name="T14">The University Management System successfully integrates multiple modules to streamline the administrative tasks of managing university data. By separating data handling (models and services) from the presentation layer (GUI and FXML), the system is both maintainable and extendable. Its role-based access control, dynamic view switching, and robust error handling make it easy for both administrators and regular users to work efficiently.</text:span></text:p>
      <text:p text:style-name="P29"><text:span text:style-name="T14">Key strengths of the system include:</text:span></text:p>
      <text:list xml:id="list4104107912" text:style-name="WWNum3">
        <text:list-item>
          <text:p text:style-name="P27"><text:span text:style-name="T14">A modular design that separates data management from the user interface.<text:line-break/></text:span></text:p>
        </text:list-item>
        <text:list-item>
          <text:p text:style-name="P23"><text:span text:style-name="T14">A user-friendly and adaptive interface that shows only the relevant functionalities based on user roles.<text:line-break/></text:span></text:p>
        </text:list-item>
        <text:list-item>
          <text:p text:style-name="P28"><text:span text:style-name="T14">Reliable validation and error handling, ensuring that data remains consistent and accurate.</text:span></text:p>
        </text:list-item>
      </text:list>
      <text:p text:style-name="P44"><text:bookmark text:name="_1uebfshceuph"/></text:p>
      <text:p text:style-name="P6"/>
      <text:p text:style-name="P10"/>
      <text:p text:style-name="P43"><text:bookmark text:name="_98besvci7tf3"/>Class Documentation</text:p>
      <text:p text:style-name="P13"/>
      <text:p text:style-name="P40"><text:bookmark text:name="_ij0ajv3mcpxw"/><text:a xlink:type="simple" xlink:href="#_e7xd3ij0nzju" text:style-name="ListLabel_20_56" text:visited-style-name="ListLabel_20_56"><text:span text:style-name="T17">EditActions</text:span></text:a><draw:frame draw:style-name="fr2" draw:name="image1.png" text:anchor-type="char" svg:x="4.6665in" svg:y="0.3898in" svg:width="1.6043in" svg:height="0.3528in" draw:z-index="6"><draw:image xlink:href="Pictures/100002010000009A00000027686C6DCF76402D8F.png" xlink:type="simple" xlink:show="embed" xlink:actuate="onLoad" loext:mime-type="image/png"/></draw:frame></text:p>
      <text:p text:style-name="P13"><text:a xlink:type="simple" xlink:href="#_ij0ajv3mcpxw" text:style-name="ListLabel_20_57" text:visited-style-name="ListLabel_20_57"><text:span text:style-name="T18">EditActions</text:span></text:a>&lt;<text:span text:style-name="T10">T</text:span> extends <text:a xlink:type="simple" xlink:href="#_dtksbu783q6s" text:style-name="ListLabel_20_57" text:visited-style-name="ListLabel_20_57"><text:span text:style-name="T18">Model</text:span></text:a>&gt; extends <text:span text:style-name="T10">TableCell</text:span>&lt;<text:span text:style-name="T10">T</text:span>, <text:span text:style-name="T10">Void</text:span>&gt;</text:p>
      <text:p text:style-name="P13">All subclasses of <text:a xlink:type="simple" xlink:href="#_ij0ajv3mcpxw" text:style-name="ListLabel_20_57" text:visited-style-name="ListLabel_20_57"><text:span text:style-name="T18">EditActions</text:span></text:a>: <text:a xlink:type="simple" xlink:href="#_qwvm0zhl4zkv" text:style-name="ListLabel_20_57" text:visited-style-name="ListLabel_20_57"><text:span text:style-name="T18">CourseEditActions</text:span></text:a>, <text:a xlink:type="simple" xlink:href="#_gtyc95109l1q" text:style-name="ListLabel_20_57" text:visited-style-name="ListLabel_20_57"><text:span text:style-name="T18">EventEditActions</text:span></text:a>, <text:a xlink:type="simple" xlink:href="#_tlj2joxheijl" text:style-name="ListLabel_20_57" text:visited-style-name="ListLabel_20_57"><text:span text:style-name="T18">SubjectEditActions</text:span></text:a>, and <text:a xlink:type="simple" xlink:href="#_pi0qflcmj09x" text:style-name="ListLabel_20_57" text:visited-style-name="ListLabel_20_57"><text:span text:style-name="T18">UserEditActions</text:span></text:a>.</text:p>
      <text:p text:style-name="P13">Superclass, creates &amp; styles buttons.</text:p>
      <text:p text:style-name="P13">Subclasses add button functionality and edit dialog.</text:p>
      <text:p text:style-name="P13"/>
      <text:p text:style-name="Standard">Purpose: makes an Edit and Delete Button for each row in a TableView.</text:p>
      <text:p text:style-name="Standard">abstract static <text:span text:style-name="T10">Dialog</text:span>&lt;<text:span text:style-name="T10">T</text:span>&gt; createEditDialog(<text:span text:style-name="T10">T</text:span> existing)</text:p>
      <text:p text:style-name="Standard"><text:tab/>…If we had abstract static methods.</text:p>
      <text:p text:style-name="P13"/>
      <text:p text:style-name="P40"><text:bookmark text:name="_qwvm0zhl4zkv"/><text:a xlink:type="simple" xlink:href="#_e7xd3ij0nzju" text:style-name="ListLabel_20_56" text:visited-style-name="ListLabel_20_56"><text:span text:style-name="T17">CourseEditActions</text:span></text:a></text:p>
      <text:p text:style-name="P13"><text:a xlink:type="simple" xlink:href="#_qwvm0zhl4zkv" text:style-name="ListLabel_20_57" text:visited-style-name="ListLabel_20_57"><text:span text:style-name="T18">CourseEditActions</text:span></text:a> extends <text:a xlink:type="simple" xlink:href="#_ij0ajv3mcpxw" text:style-name="ListLabel_20_57" text:visited-style-name="ListLabel_20_57"><text:span text:style-name="T18">EditActions</text:span></text:a>&lt;<text:a xlink:type="simple" xlink:href="#_317sd7c6hob4" text:style-name="ListLabel_20_57" text:visited-style-name="ListLabel_20_57"><text:span text:style-name="T18">Course</text:span></text:a>&gt;</text:p>
      <text:p text:style-name="P13">Subclass for CourseManagement edit actions.</text:p>
      <text:p text:style-name="P13"/>
      <text:p text:style-name="Standard">Purpose: Manages Editing and deleting specific to “Courses”</text:p>
      <text:p text:style-name="Standard"/>
      <text:p text:style-name="Heading_20_2"><text:bookmark text:name="_gtyc95109l1q"/><text:a xlink:type="simple" xlink:href="#_e7xd3ij0nzju" text:style-name="ListLabel_20_56" text:visited-style-name="ListLabel_20_56"><text:span text:style-name="T17">EventEditActions</text:span></text:a></text:p>
      <text:p text:style-name="Standard"><text:a xlink:type="simple" xlink:href="#_gtyc95109l1q" text:style-name="ListLabel_20_57" text:visited-style-name="ListLabel_20_57"><text:span text:style-name="T18">EventEditActions</text:span></text:a> extends <text:a xlink:type="simple" xlink:href="#_ij0ajv3mcpxw" text:style-name="ListLabel_20_57" text:visited-style-name="ListLabel_20_57"><text:span text:style-name="T18">EditActions</text:span></text:a>&lt;<text:a xlink:type="simple" xlink:href="#_51yov5vp1y84" text:style-name="ListLabel_20_57" text:visited-style-name="ListLabel_20_57"><text:span text:style-name="T18">Event</text:span></text:a>&gt;</text:p>
      <text:p text:style-name="Standard">Subclass for EventManagement edit actions.</text:p>
      <text:p text:style-name="Standard"><text:soft-page-break/></text:p>
      <text:p text:style-name="Standard">Purpose: Manages Editing and deleting specific to “Events”</text:p>
      <text:p text:style-name="Standard"/>
      <text:p text:style-name="Heading_20_2"><text:bookmark text:name="_tlj2joxheijl"/><text:a xlink:type="simple" xlink:href="#_e7xd3ij0nzju" text:style-name="ListLabel_20_56" text:visited-style-name="ListLabel_20_56"><text:span text:style-name="T17">SubjectEditActions</text:span></text:a></text:p>
      <text:p text:style-name="Standard"><text:a xlink:type="simple" xlink:href="#_tlj2joxheijl" text:style-name="ListLabel_20_57" text:visited-style-name="ListLabel_20_57"><text:span text:style-name="T18">SubjectEditActions</text:span></text:a> extends <text:a xlink:type="simple" xlink:href="#_ij0ajv3mcpxw" text:style-name="ListLabel_20_57" text:visited-style-name="ListLabel_20_57"><text:span text:style-name="T18">EditActions</text:span></text:a>&lt;<text:a xlink:type="simple" xlink:href="#_e5qu73y6aza9" text:style-name="ListLabel_20_57" text:visited-style-name="ListLabel_20_57"><text:span text:style-name="T18">Subject</text:span></text:a>&gt;</text:p>
      <text:p text:style-name="Standard">Subclass for SubjectManagement edit actions.</text:p>
      <text:p text:style-name="Standard"/>
      <text:p text:style-name="Standard">Purpose: Manages Editing and deleting specific to “Subjects”</text:p>
      <text:p text:style-name="Standard"/>
      <text:p text:style-name="Heading_20_2"><text:bookmark text:name="_pi0qflcmj09x"/><text:a xlink:type="simple" xlink:href="#_e7xd3ij0nzju" text:style-name="ListLabel_20_56" text:visited-style-name="ListLabel_20_56"><text:span text:style-name="T17">UserEditActions</text:span></text:a></text:p>
      <text:p text:style-name="Standard"><text:a xlink:type="simple" xlink:href="#_pi0qflcmj09x" text:style-name="ListLabel_20_57" text:visited-style-name="ListLabel_20_57"><text:span text:style-name="T18">UserEditActions</text:span></text:a> extends <text:a xlink:type="simple" xlink:href="#_ij0ajv3mcpxw" text:style-name="ListLabel_20_57" text:visited-style-name="ListLabel_20_57"><text:span text:style-name="T18">EditActions</text:span></text:a>&lt;<text:a xlink:type="simple" xlink:href="#_bcfs57gbowue" text:style-name="ListLabel_20_57" text:visited-style-name="ListLabel_20_57"><text:span text:style-name="T18">User</text:span></text:a>&gt;</text:p>
      <text:p text:style-name="Standard">Subclass for UserManagement edit actions.</text:p>
      <text:p text:style-name="Standard"/>
      <text:p text:style-name="Standard">Purpose: Manages Editing and deleting specific to “Users”</text:p>
      <text:p text:style-name="Standard"/>
      <text:p text:style-name="P36"><text:bookmark text:name="_1wxnvfhujjym"/><text:a xlink:type="simple" xlink:href="#_e7xd3ij0nzju" text:style-name="ListLabel_20_56" text:visited-style-name="ListLabel_20_56"><text:span text:style-name="T17">Management</text:span></text:a></text:p>
      <text:p text:style-name="Standard"><text:a xlink:type="simple" xlink:href="#_1wxnvfhujjym" text:style-name="ListLabel_20_57" text:visited-style-name="ListLabel_20_57"><text:span text:style-name="T18">Management</text:span></text:a>&lt;<text:span text:style-name="T10">T</text:span> extends <text:a xlink:type="simple" xlink:href="#_dtksbu783q6s" text:style-name="ListLabel_20_57" text:visited-style-name="ListLabel_20_57"><text:span text:style-name="T18">Model</text:span></text:a>&gt; extends <text:span text:style-name="T10">VBox</text:span></text:p>
      <text:p text:style-name="P1">All subclasses of <text:a xlink:type="simple" xlink:href="#_1wxnvfhujjym" text:style-name="ListLabel_20_57" text:visited-style-name="ListLabel_20_57"><text:span text:style-name="T18">Management</text:span></text:a>: <text:a xlink:type="simple" xlink:href="#_wkkl678cmeqq" text:style-name="ListLabel_20_57" text:visited-style-name="ListLabel_20_57"><text:span text:style-name="T18">CourseManagement</text:span></text:a>, <text:a xlink:type="simple" xlink:href="#_3sdnhv6nhh3o" text:style-name="ListLabel_20_57" text:visited-style-name="ListLabel_20_57"><text:span text:style-name="T18">EventManagement</text:span></text:a>, <text:a xlink:type="simple" xlink:href="#_ygtsppk2rw42" text:style-name="ListLabel_20_57" text:visited-style-name="ListLabel_20_57"><text:span text:style-name="T18">SubjectManagement</text:span></text:a>, and <text:a xlink:type="simple" xlink:href="#_jfsm8cjg40bj" text:style-name="ListLabel_20_57" text:visited-style-name="ListLabel_20_57"><text:span text:style-name="T18">UserManagement</text:span></text:a>.</text:p>
      <text:p text:style-name="Standard">Superclass creates styles and adds functionality to buttons.</text:p>
      <text:p text:style-name="Standard">Subclasses tell superclass associated Service, EditActions, and FXML file path.</text:p>
      <text:p text:style-name="Standard"/>
      <text:p text:style-name="Standard">Purpose: Serves as the base class for all management views. It loads its layout from an FXML file, initializes a TableView with data from a service class, and could load other features depending on the USER (user, admin, or faculty).</text:p>
      <text:p text:style-name="Standard"/>
      <text:p text:style-name="Heading_20_2"><text:bookmark text:name="_wkkl678cmeqq"/><text:a xlink:type="simple" xlink:href="#_e7xd3ij0nzju" text:style-name="ListLabel_20_56" text:visited-style-name="ListLabel_20_56"><text:span text:style-name="T17">CourseManagement</text:span></text:a></text:p>
      <text:p text:style-name="Standard"><text:a xlink:type="simple" xlink:href="#_wkkl678cmeqq" text:style-name="ListLabel_20_57" text:visited-style-name="ListLabel_20_57"><text:span text:style-name="T18">CourseManagement</text:span></text:a> extends <text:a xlink:type="simple" xlink:href="#_1wxnvfhujjym" text:style-name="ListLabel_20_57" text:visited-style-name="ListLabel_20_57"><text:span text:style-name="T18">Management</text:span></text:a>&lt;<text:a xlink:type="simple" xlink:href="#_317sd7c6hob4" text:style-name="ListLabel_20_57" text:visited-style-name="ListLabel_20_57"><text:span text:style-name="T18">Course</text:span></text:a>&gt;</text:p>
      <text:p text:style-name="Standard">associated CourseService, CourseEditActions, and CourseManagement.fxml.</text:p>
      <text:p text:style-name="Standard"/>
      <text:p text:style-name="Standard">Purpose: Handles event management by interfacing with EventService and using EventEditActions, along with the “EventManagement.fxml” layout.</text:p>
      <text:p text:style-name="Standard"/>
      <text:p text:style-name="Heading_20_2"><text:bookmark text:name="_3sdnhv6nhh3o"/><text:a xlink:type="simple" xlink:href="#_e7xd3ij0nzju" text:style-name="ListLabel_20_56" text:visited-style-name="ListLabel_20_56"><text:span text:style-name="T17">EventManagement</text:span></text:a></text:p>
      <text:p text:style-name="Standard"><text:a xlink:type="simple" xlink:href="#_3sdnhv6nhh3o" text:style-name="ListLabel_20_57" text:visited-style-name="ListLabel_20_57"><text:span text:style-name="T18">EventManagement</text:span></text:a> extends <text:a xlink:type="simple" xlink:href="#_1wxnvfhujjym" text:style-name="ListLabel_20_57" text:visited-style-name="ListLabel_20_57"><text:span text:style-name="T18">Management</text:span></text:a>&lt;<text:a xlink:type="simple" xlink:href="#_51yov5vp1y84" text:style-name="ListLabel_20_57" text:visited-style-name="ListLabel_20_57"><text:span text:style-name="T18">Event</text:span></text:a>&gt;</text:p>
      <text:p text:style-name="Standard">associated EventService, EventEditActions, and EventManagement.fxml.</text:p>
      <text:p text:style-name="Standard"/>
      <text:p text:style-name="Standard">Purpose: Handles event management by interfacing with EventService and using EventEditActions, along with the “EventManagement.fxml” layout.</text:p>
      <text:p text:style-name="Standard"/>
      <text:p text:style-name="Heading_20_2"><text:bookmark text:name="_ygtsppk2rw42"/><text:a xlink:type="simple" xlink:href="#_e7xd3ij0nzju" text:style-name="ListLabel_20_56" text:visited-style-name="ListLabel_20_56"><text:span text:style-name="T17">SubjectManagement</text:span></text:a></text:p>
      <text:p text:style-name="Standard"><text:soft-page-break/><text:a xlink:type="simple" xlink:href="#_ygtsppk2rw42" text:style-name="ListLabel_20_57" text:visited-style-name="ListLabel_20_57"><text:span text:style-name="T18">SubjectManagement</text:span></text:a> extends <text:a xlink:type="simple" xlink:href="#_1wxnvfhujjym" text:style-name="ListLabel_20_57" text:visited-style-name="ListLabel_20_57"><text:span text:style-name="T18">Management</text:span></text:a>&lt;<text:a xlink:type="simple" xlink:href="#_e5qu73y6aza9" text:style-name="ListLabel_20_57" text:visited-style-name="ListLabel_20_57"><text:span text:style-name="T18">Subject</text:span></text:a>&gt;</text:p>
      <text:p text:style-name="Standard">associated SubjectService, SubjectEditActions, and SubjectManagement.fxml.</text:p>
      <text:p text:style-name="Standard"/>
      <text:p text:style-name="Standard">Purpose: Manages subjects by utilizing SubjectService and SubjectEditActions, with its interface defined in “SubjectManagement.fxml.”</text:p>
      <text:p text:style-name="Standard"/>
      <text:p text:style-name="Heading_20_2"><text:bookmark text:name="_jfsm8cjg40bj"/><text:a xlink:type="simple" xlink:href="#_e7xd3ij0nzju" text:style-name="ListLabel_20_56" text:visited-style-name="ListLabel_20_56"><text:span text:style-name="T17">UserManagement</text:span></text:a></text:p>
      <text:p text:style-name="Standard"><text:a xlink:type="simple" xlink:href="#_jfsm8cjg40bj" text:style-name="ListLabel_20_57" text:visited-style-name="ListLabel_20_57"><text:span text:style-name="T18">UserManagement</text:span></text:a> extends <text:a xlink:type="simple" xlink:href="#_1wxnvfhujjym" text:style-name="ListLabel_20_57" text:visited-style-name="ListLabel_20_57"><text:span text:style-name="T18">Management</text:span></text:a>&lt;<text:a xlink:type="simple" xlink:href="#_bcfs57gbowue" text:style-name="ListLabel_20_57" text:visited-style-name="ListLabel_20_57"><text:span text:style-name="T18">User</text:span></text:a>&gt;</text:p>
      <text:p text:style-name="Standard">associated UserService, UserEditActions, and UserManagement.fxml.</text:p>
      <text:p text:style-name="Standard"/>
      <text:p text:style-name="Standard">Purpose: Deals with user accounts (Admin, Faculty, and Student). It integrates UserService with UserEditActions and loads its interface from “UserManagement.fxml.”</text:p>
      <text:p text:style-name="Standard"/>
      <text:p text:style-name="P38"><text:bookmark text:name="_1rce9ay60xh"/><text:a xlink:type="simple" xlink:href="#_e7xd3ij0nzju" text:style-name="ListLabel_20_56" text:visited-style-name="ListLabel_20_56"><text:span text:style-name="T17">LoginScreen</text:span></text:a><draw:frame draw:style-name="fr3" draw:name="image3.png" text:anchor-type="char" svg:x="4.1043in" svg:y="0.0626in" svg:width="2.1646in" svg:height="1.6516in" draw:z-index="5"><draw:image xlink:href="Pictures/100002010000036C000002B946C9C0452DAD8D29.png" xlink:type="simple" xlink:show="embed" xlink:actuate="onLoad" loext:mime-type="image/png"/></draw:frame></text:p>
      <text:p text:style-name="P34"><text:a xlink:type="simple" xlink:href="#_1rce9ay60xh" text:style-name="ListLabel_20_57" text:visited-style-name="ListLabel_20_57"><text:span text:style-name="T18">LoginScreen</text:span></text:a> extends <text:span text:style-name="T10">StackPane</text:span></text:p>
      <text:p text:style-name="P34"><text:a xlink:type="simple" xlink:href="#_1rce9ay60xh" text:style-name="ListLabel_20_57" text:visited-style-name="ListLabel_20_57"><text:span text:style-name="T18">LoginScreen</text:span></text:a> is the class responsible for handling the login process.</text:p>
      <text:p text:style-name="P34">The class loads LoginScreen.fxml through the FXMLLoader fxml Loader, setting the LoginScreen as its controller and root with setController and setRoot. After successfully attempting to load, the login screen is displayed.</text:p>
      <text:p text:style-name="P34"/>
      <text:p text:style-name="P34">When the login button is pressed, the username and password inputs are stored in <text:span text:style-name="T10">username </text:span>and <text:span text:style-name="T10">password, </text:span>respectively, notably password is converted to a byte array as that is required for the <text:span text:style-name="T10">login</text:span> method of the user. Then for each <text:a xlink:type="simple" xlink:href="#_bcfs57gbowue" text:style-name="ListLabel_20_57" text:visited-style-name="ListLabel_20_57"><text:span text:style-name="T18">User</text:span></text:a> (subclasses included) in <text:a xlink:type="simple" xlink:href="#_593ykqpijqfr" text:style-name="ListLabel_20_57" text:visited-style-name="ListLabel_20_57"><text:span text:style-name="T18">UserService</text:span></text:a><text:span text:style-name="T10">.getAll </text:span>the id of that user, from <text:span text:style-name="T10">getID</text:span>, is compared to the username which was input, if they match the <text:span text:style-name="T10">login</text:span> method of the user is called returning either true or false based on whether the password is correct. If the <text:span text:style-name="T10">login </text:span>method returns true, <text:a xlink:type="simple" xlink:href="#_wn2ikl8aco5t" text:style-name="ListLabel_20_57" text:visited-style-name="ListLabel_20_57"><text:span text:style-name="T18">MainApp</text:span></text:a><text:span text:style-name="T10">.user </text:span>is set to that user, and the screen is set up. If there are no matches after iterating through each user, the<text:span text:style-name="T10"> errorMessage</text:span> object is loaded.</text:p>
      <text:p text:style-name="Standard"><draw:frame draw:style-name="fr4" draw:name="image2.png" text:anchor-type="char" svg:x="3.3957in" svg:y="0.3138in" svg:width="2.8717in" svg:height="1.6563in" draw:z-index="4"><draw:image xlink:href="Pictures/1000020100000584000003416448C76C5B50E7DC.png" xlink:type="simple" xlink:show="embed" xlink:actuate="onLoad" loext:mime-type="image/png"/></draw:frame></text:p>
      <text:p text:style-name="Heading_20_2"><text:bookmark text:name="_7rsk26726bzr"/><text:a xlink:type="simple" xlink:href="#_e7xd3ij0nzju" text:style-name="ListLabel_20_56" text:visited-style-name="ListLabel_20_56"><text:span text:style-name="T17">MainLayout</text:span></text:a></text:p>
      <text:p text:style-name="Standard"><text:a xlink:type="simple" xlink:href="#_7rsk26726bzr" text:style-name="ListLabel_20_57" text:visited-style-name="ListLabel_20_57"><text:span text:style-name="T18">MainLayout</text:span></text:a> extends <text:span text:style-name="T10">BorderPane</text:span></text:p>
      <text:p text:style-name="Standard">Creates all management pages.</text:p>
      <text:p text:style-name="Standard">The main layout includes a <text:a xlink:type="simple" xlink:href="#_tsjc7txpnv9u" text:style-name="ListLabel_20_57" text:visited-style-name="ListLabel_20_57"><text:span text:style-name="T18">Header</text:span></text:a>, <text:a xlink:type="simple" xlink:href="#_mgcwhc7mc7n6" text:style-name="ListLabel_20_57" text:visited-style-name="ListLabel_20_57"><text:span text:style-name="T18">Nav</text:span></text:a> and the current content.</text:p>
      <text:p text:style-name="Standard"/>
      <text:p text:style-name="Standard"/>
      <text:p text:style-name="Heading_20_2"><text:bookmark text:name="_tsjc7txpnv9u"/><text:a xlink:type="simple" xlink:href="#_e7xd3ij0nzju" text:style-name="ListLabel_20_56" text:visited-style-name="ListLabel_20_56"><text:span text:style-name="T17">Header</text:span></text:a><draw:frame draw:style-name="fr5" draw:name="image5.png" text:anchor-type="char" svg:x="3.3957in" svg:y="0.1319in" svg:width="2.8752in" svg:height="0.2437in" draw:z-index="3"><draw:image xlink:href="Pictures/100002010000024D00000032B49F63E5D6C85846.png" xlink:type="simple" xlink:show="embed" xlink:actuate="onLoad" loext:mime-type="image/png"/></draw:frame></text:p>
      <text:p text:style-name="Standard"><text:a xlink:type="simple" xlink:href="#_tsjc7txpnv9u" text:style-name="ListLabel_20_57" text:visited-style-name="ListLabel_20_57"><text:span text:style-name="T18">Header</text:span></text:a> extends <text:span text:style-name="T10">HBox</text:span></text:p>
      <text:p text:style-name="Standard"/>
      <text:p text:style-name="Standard">Displays the logged-in user’s information and a logout button. Loaded from an FXML file, it updates its display based on the current user and returns to LoginScreen when logout is pressed.</text:p>
      <text:p text:style-name="Standard"/>
      <text:p text:style-name="Heading_20_2"><text:bookmark text:name="_mgcwhc7mc7n6"/><text:a xlink:type="simple" xlink:href="#_e7xd3ij0nzju" text:style-name="ListLabel_20_56" text:visited-style-name="ListLabel_20_56"><text:span text:style-name="T17">Nav</text:span></text:a><draw:frame draw:style-name="fr6" draw:name="Image1" text:anchor-type="char" svg:x="5.2681in" svg:y="0.3543in" svg:width="0.9972in" svg:height="1.1283in" draw:z-index="2"><draw:image xlink:href="Pictures/1000020100000584000003416448C76C5B50E7DC.png" xlink:type="simple" xlink:show="embed" xlink:actuate="onLoad" loext:mime-type="image/png"/></draw:frame></text:p>
      <text:p text:style-name="Standard"><text:a xlink:type="simple" xlink:href="#_mgcwhc7mc7n6" text:style-name="ListLabel_20_57" text:visited-style-name="ListLabel_20_57"><text:span text:style-name="T18">Nav</text:span></text:a> extends <text:span text:style-name="T10">SkinBase</text:span>&lt;<text:span text:style-name="T10">TitledPane</text:span>&gt;</text:p>
      <text:p text:style-name="Standard">Holds <text:a xlink:type="simple" xlink:href="#_70kh7s77yytr" text:style-name="ListLabel_20_57" text:visited-style-name="ListLabel_20_57"><text:span text:style-name="T18">MenuItem</text:span></text:a>s and collapses horizontally.</text:p>
      <text:p text:style-name="Standard"><text:soft-page-break/>Customizes the navigation pane with a collapsible menu. It manages the animation and layout of the menu items and works with MenuItem to update the content area.</text:p>
      <text:p text:style-name="Standard"/>
      <text:p text:style-name="P36"><text:bookmark text:name="_70kh7s77yytr"/><text:a xlink:type="simple" xlink:href="#_e7xd3ij0nzju" text:style-name="ListLabel_20_56" text:visited-style-name="ListLabel_20_56"><text:span text:style-name="T17">MenuItem</text:span></text:a><draw:frame draw:style-name="fr7" draw:name="Image2" text:anchor-type="char" svg:x="4.4756in" svg:y="0.3492in" svg:width="1.7917in" svg:height="0.3429in" draw:z-index="1"><draw:image xlink:href="Pictures/1000020100000584000003416448C76C5B50E7DC.png" xlink:type="simple" xlink:show="embed" xlink:actuate="onLoad" loext:mime-type="image/png"/></draw:frame></text:p>
      <text:p text:style-name="Standard"><text:a xlink:type="simple" xlink:href="#_70kh7s77yytr" text:style-name="ListLabel_20_57" text:visited-style-name="ListLabel_20_57"><text:span text:style-name="T18">MenuItem</text:span></text:a> extends <text:span text:style-name="T10">VBox</text:span></text:p>
      <text:p text:style-name="Standard">This acts like a button, and when pressed, it navigates you to its page. </text:p>
      <text:p text:style-name="Standard"><draw:frame draw:style-name="fr8" draw:name="Image3" text:anchor-type="char" svg:x="4.861in" svg:y="0.2929in" svg:width="1.4063in" svg:height="0.7591in" draw:z-index="0"><draw:image xlink:href="Pictures/1000020100000584000003416448C76C5B50E7DC.png" xlink:type="simple" xlink:show="embed" xlink:actuate="onLoad" loext:mime-type="image/png"/></draw:frame></text:p>
      <text:p text:style-name="Heading_20_2"><text:bookmark text:name="_5o51d02hwbd0"/><text:a xlink:type="simple" xlink:href="#_e7xd3ij0nzju" text:style-name="ListLabel_20_56" text:visited-style-name="ListLabel_20_56"><text:span text:style-name="T17">MetricCard</text:span></text:a></text:p>
      <text:p text:style-name="Standard"><text:a xlink:type="simple" xlink:href="#_5o51d02hwbd0" text:style-name="ListLabel_20_57" text:visited-style-name="ListLabel_20_57"><text:span text:style-name="T18">MetricCard</text:span></text:a> extends <text:span text:style-name="T10">VBox</text:span></text:p>
      <text:p text:style-name="Standard">Displays statistics, title and a value</text:p>
      <text:p text:style-name="Standard"/>
      <text:p text:style-name="Heading_20_2"><text:bookmark text:name="_2gq1n3pj0h13"/><text:a xlink:type="simple" xlink:href="#_e7xd3ij0nzju" text:style-name="ListLabel_20_56" text:visited-style-name="ListLabel_20_56"><text:span text:style-name="T17">Spacer</text:span></text:a></text:p>
      <text:p text:style-name="Standard"><text:a xlink:type="simple" xlink:href="#_2gq1n3pj0h13" text:style-name="ListLabel_20_57" text:visited-style-name="ListLabel_20_57"><text:span text:style-name="T18">Spacer</text:span></text:a> extends <text:span text:style-name="T10">Region</text:span></text:p>
      <text:p text:style-name="Standard">Literally a spacer, a UI component that adds flexible space</text:p>
      <text:p text:style-name="Standard"/>
      <text:p text:style-name="Heading_20_2"><text:bookmark text:name="_dtksbu783q6s"/><text:a xlink:type="simple" xlink:href="#_e7xd3ij0nzju" text:style-name="ListLabel_20_56" text:visited-style-name="ListLabel_20_56"><text:span text:style-name="T17">Model</text:span></text:a></text:p>
      <text:p text:style-name="Standard"><text:a xlink:type="simple" xlink:href="#_dtksbu783q6s" text:style-name="ListLabel_20_57" text:visited-style-name="ListLabel_20_57"><text:span text:style-name="T18">Model</text:span></text:a></text:p>
      <text:p text:style-name="Standard">This is the base class for all data entities made</text:p>
      <text:p text:style-name="P1">All subclasses of <text:a xlink:type="simple" xlink:href="#_dtksbu783q6s" text:style-name="ListLabel_20_57" text:visited-style-name="ListLabel_20_57"><text:span text:style-name="T18">Model</text:span></text:a>: <text:a xlink:type="simple" xlink:href="#_317sd7c6hob4" text:style-name="ListLabel_20_57" text:visited-style-name="ListLabel_20_57"><text:span text:style-name="T18">Course</text:span></text:a>, <text:a xlink:type="simple" xlink:href="#_51yov5vp1y84" text:style-name="ListLabel_20_57" text:visited-style-name="ListLabel_20_57"><text:span text:style-name="T18">Event</text:span></text:a>, <text:a xlink:type="simple" xlink:href="#_e5qu73y6aza9" text:style-name="ListLabel_20_57" text:visited-style-name="ListLabel_20_57"><text:span text:style-name="T18">Subject</text:span></text:a>, <text:a xlink:type="simple" xlink:href="#_bcfs57gbowue" text:style-name="ListLabel_20_57" text:visited-style-name="ListLabel_20_57"><text:span text:style-name="T18">User</text:span></text:a> and subclasses.</text:p>
      <text:p text:style-name="Standard">Each subclass of <text:a xlink:type="simple" xlink:href="#_dtksbu783q6s" text:style-name="ListLabel_20_57" text:visited-style-name="ListLabel_20_57"><text:span text:style-name="T18">Model</text:span></text:a> must have an isEqual method that returns a boolean.</text:p>
      <text:p text:style-name="Standard">abstract <text:span text:style-name="T10">boolean</text:span> isEqual(<text:a xlink:type="simple" xlink:href="https://docs.google.com/document/d/1TsaLpf7wxHbFcYYxB5TA74ofSMi3ia1hY2qLPCi5udU/edit?pli=1&amp;tab=t.0#heading=h.dtksbu783q6s" text:style-name="ListLabel_20_57" text:visited-style-name="ListLabel_20_57"><text:span text:style-name="T18">Model</text:span></text:a> updated)</text:p>
      <text:p text:style-name="Standard"/>
      <text:p text:style-name="P35"><text:bookmark text:name="_317sd7c6hob4"/><text:a xlink:type="simple" xlink:href="#_e7xd3ij0nzju" text:style-name="ListLabel_20_56" text:visited-style-name="ListLabel_20_56"><text:span text:style-name="T17">Course</text:span></text:a></text:p>
      <text:p text:style-name="Standard"><text:a xlink:type="simple" xlink:href="#_317sd7c6hob4" text:style-name="ListLabel_20_57" text:visited-style-name="ListLabel_20_57"><text:span text:style-name="T18">Course</text:span></text:a> Extends <text:a xlink:type="simple" xlink:href="#_dtksbu783q6s" text:style-name="ListLabel_20_57" text:visited-style-name="ListLabel_20_57"><text:span text:style-name="T18">Model</text:span></text:a></text:p>
      <text:p text:style-name="Standard"><text:soft-page-break/>Represents a course, the attributes being, the course code, name subject, section, capacity, location and teacher.</text:p>
      <text:p text:style-name="Standard">get/set <text:span text:style-name="T10">String</text:span> code;</text:p>
      <text:p text:style-name="Standard">get/set <text:span text:style-name="T10">String</text:span> courseName;</text:p>
      <text:p text:style-name="Standard">get/set <text:span text:style-name="T10">String</text:span> subject;</text:p>
      <text:p text:style-name="Standard">get/set <text:span text:style-name="T10">String</text:span> section;</text:p>
      <text:p text:style-name="Standard">get/set <text:span text:style-name="T10">String</text:span> capacity;</text:p>
      <text:p text:style-name="Standard">get/set <text:span text:style-name="T10">String</text:span> location;</text:p>
      <text:p text:style-name="Standard">get/set <text:span text:style-name="T10">String</text:span> teacher;</text:p>
      <text:p text:style-name="Standard"/>
      <text:p text:style-name="P35"><text:bookmark text:name="_51yov5vp1y84"/><text:a xlink:type="simple" xlink:href="#_e7xd3ij0nzju" text:style-name="ListLabel_20_56" text:visited-style-name="ListLabel_20_56"><text:span text:style-name="T17">Event</text:span></text:a></text:p>
      <text:p text:style-name="Standard"><text:a xlink:type="simple" xlink:href="#_51yov5vp1y84" text:style-name="ListLabel_20_57" text:visited-style-name="ListLabel_20_57"><text:span text:style-name="T18">Event</text:span></text:a> extends <text:a xlink:type="simple" xlink:href="#_dtksbu783q6s" text:style-name="ListLabel_20_57" text:visited-style-name="ListLabel_20_57"><text:span text:style-name="T18">Model</text:span></text:a></text:p>
      <text:p text:style-name="Standard">Represents and event, the attributes being an event name, code, description, capacity and cost.</text:p>
      <text:p text:style-name="Standard">get/set <text:span text:style-name="T10">String</text:span> code;</text:p>
      <text:p text:style-name="Standard">get/set <text:span text:style-name="T10">String</text:span> eventName;</text:p>
      <text:p text:style-name="Standard">get/set <text:span text:style-name="T10">String</text:span> capacity;</text:p>
      <text:p text:style-name="Standard">get/set <text:span text:style-name="T10">String</text:span> cost;</text:p>
      <text:p text:style-name="Standard">get/set <text:span text:style-name="T10">String</text:span> description;</text:p>
      <text:p text:style-name="Standard"/>
      <text:p text:style-name="P35"><text:bookmark text:name="_e5qu73y6aza9"/><text:a xlink:type="simple" xlink:href="#_e7xd3ij0nzju" text:style-name="ListLabel_20_56" text:visited-style-name="ListLabel_20_56"><text:span text:style-name="T17">Subject</text:span></text:a></text:p>
      <text:p text:style-name="Standard"><text:a xlink:type="simple" xlink:href="#_e5qu73y6aza9" text:style-name="ListLabel_20_57" text:visited-style-name="ListLabel_20_57"><text:span text:style-name="T18">Subject</text:span></text:a> Extends <text:a xlink:type="simple" xlink:href="#_dtksbu783q6s" text:style-name="ListLabel_20_57" text:visited-style-name="ListLabel_20_57"><text:span text:style-name="T18">Model</text:span></text:a></text:p>
      <text:p text:style-name="Standard">Represents an academic subject with a subject code and name, used for organising courses and managing enrolments</text:p>
      <text:p text:style-name="Standard"><text:soft-page-break/>get/set <text:span text:style-name="T10">String</text:span> code;</text:p>
      <text:p text:style-name="Standard">get/set <text:span text:style-name="T10">String</text:span> subjectName;</text:p>
      <text:p text:style-name="Standard"/>
      <text:p text:style-name="Heading_20_2"><text:bookmark text:name="_bcfs57gbowue"/><text:a xlink:type="simple" xlink:href="#_e7xd3ij0nzju" text:style-name="ListLabel_20_56" text:visited-style-name="ListLabel_20_56"><text:span text:style-name="T17">User</text:span></text:a></text:p>
      <text:p text:style-name="P1"><text:a xlink:type="simple" xlink:href="#_bcfs57gbowue" text:style-name="ListLabel_20_57" text:visited-style-name="ListLabel_20_57"><text:span text:style-name="T18">User</text:span></text:a> extends <text:a xlink:type="simple" xlink:href="#_dtksbu783q6s" text:style-name="ListLabel_20_57" text:visited-style-name="ListLabel_20_57"><text:span text:style-name="T18">Model</text:span></text:a></text:p>
      <text:p text:style-name="P10">All subclasses of <text:a xlink:type="simple" xlink:href="#_bcfs57gbowue" text:style-name="ListLabel_20_57" text:visited-style-name="ListLabel_20_57"><text:span text:style-name="T18">User</text:span></text:a>: <text:a xlink:type="simple" xlink:href="#_p6zfqihdhhd4" text:style-name="ListLabel_20_57" text:visited-style-name="ListLabel_20_57"><text:span text:style-name="T18">Admin</text:span></text:a>, <text:a xlink:type="simple" xlink:href="#_8rkycz954mt1" text:style-name="ListLabel_20_57" text:visited-style-name="ListLabel_20_57"><text:span text:style-name="T18">Faculty</text:span></text:a>, <text:a xlink:type="simple" xlink:href="#_nvyosh22n95z" text:style-name="ListLabel_20_57" text:visited-style-name="ListLabel_20_57"><text:span text:style-name="T18">Student</text:span></text:a><text:span text:style-name="T7">.</text:span></text:p>
      <text:p text:style-name="P10">T<text:span text:style-name="T7">he </text:span><text:a xlink:type="simple" xlink:href="#_bcfs57gbowue" text:style-name="ListLabel_20_57" text:visited-style-name="ListLabel_20_57"><text:span text:style-name="T18">User</text:span></text:a><text:span text:style-name="T7"> class inherits from the abstract class </text:span><text:a xlink:type="simple" xlink:href="#_dtksbu783q6s" text:style-name="ListLabel_20_57" text:visited-style-name="ListLabel_20_57"><text:span text:style-name="T18">Model</text:span></text:a>,<text:span text:style-name="T7"> which itself sets the template that each subclass of </text:span><text:a xlink:type="simple" xlink:href="#_dtksbu783q6s" text:style-name="ListLabel_20_57" text:visited-style-name="ListLabel_20_57"><text:span text:style-name="T18">Model</text:span></text:a><text:span text:style-name="T7"> must have an isEqual method </text:span>that<text:span text:style-name="T7"> returns a boolean. This method is implemented in the </text:span><text:a xlink:type="simple" xlink:href="#_bcfs57gbowue" text:style-name="ListLabel_20_57" text:visited-style-name="ListLabel_20_57"><text:span text:style-name="T18">User</text:span></text:a><text:span text:style-name="T8"> </text:span><text:span text:style-name="T7">class </text:span>,<text:span text:style-name="T7">where it checks if the Model (including subclasses) added as </text:span>an <text:span text:style-name="T7">argument is the same as the Model the </text:span>technique<text:span text:style-name="T7"> is being called from. This is used as a part of verification during the login process.</text:span></text:p>
      <text:p text:style-name="P10"><text:span text:style-name="T7">Most attributes of the </text:span><text:a xlink:type="simple" xlink:href="#_bcfs57gbowue" text:style-name="ListLabel_20_57" text:visited-style-name="ListLabel_20_57"><text:span text:style-name="T18">User</text:span></text:a><text:span text:style-name="T7"> class are private unless there is a reason for them to be accessed directly</text:span>;<text:span text:style-name="T7"> this is to ensure control over what information can be acquired from the </text:span><text:a xlink:type="simple" xlink:href="#_bcfs57gbowue" text:style-name="ListLabel_20_58" text:visited-style-name="ListLabel_20_58"><text:span text:style-name="T10">User</text:span></text:a><text:span text:style-name="T7"> class, such as preventing passwords from being read directly.</text:span></text:p>
      <text:p text:style-name="P10"><text:span text:style-name="T10">Id</text:span><text:span text:style-name="T7">, </text:span><text:span text:style-name="T8">fullName</text:span><text:span text:style-name="T7">, and </text:span><text:span text:style-name="T8">email </text:span><text:span text:style-name="T7">are attributes stored as private StringProperty.</text:span></text:p>
      <text:p text:style-name="P10"><text:span text:style-name="T7">Setting them to StringProperty is helpful as it makes binding to Labels </text:span>easier<text:span text:style-name="T7"> in JavaFX.</text:span></text:p>
      <text:p text:style-name="P10"><text:span text:style-name="T10">Role</text:span><text:span text:style-name="T7"> is a private enum set during construction based on the subclass being created. If the user has the ADMIN role, they have access to the admin options, likewise for STUDENT and FACULTY. By making </text:span>the <text:span text:style-name="T7">role an attribute instead of checking which subclass the user is, it allows for greater flexibility in permissions, such as temporarily changing the role for a certain operation that requires higher permissions (Though such operations were ultimately handled without changing the role).</text:span></text:p>
      <text:p text:style-name="P10"><text:span text:style-name="T7">The class has typical getter and setter methods for relevant classes</text:span>,<text:span text:style-name="T7"> with the exception being </text:span><text:span text:style-name="T8">setPasswor</text:span><text:span text:style-name="T10">,</text:span><text:span text:style-name="T8">d</text:span><text:span text:style-name="T7"> which is different on account of the class using the salt and hash method to store passwords.</text:span></text:p>
      <text:p text:style-name="P10"><text:span text:style-name="T7">The entire password process is implemented through the methods: </text:span><text:span text:style-name="T8">setPassword</text:span><text:span text:style-name="T7">, </text:span><text:span text:style-name="T8">newSalt</text:span><text:span text:style-name="T7">, and </text:span><text:span text:style-name="T8">hash</text:span><text:span text:style-name="T7">, as well as the attributes: </text:span><text:span text:style-name="T8">passwordSalt</text:span><text:span text:style-name="T7">,and </text:span><text:span text:style-name="T8">passwordHash</text:span><text:span text:style-name="T7">.</text:span></text:p>
      <text:p text:style-name="P10"><text:span text:style-name="T8">setPassword</text:span><text:span text:style-name="T7"> calls the relevant methods to update the </text:span><text:span text:style-name="T8">passwordSalt</text:span><text:span text:style-name="T7"> and </text:span><text:span text:style-name="T8">passwordHash</text:span><text:span text:style-name="T7"> attributes. This is run once during the construction of the object and whenever the password must be updated.</text:span></text:p>
      <text:p text:style-name="P10"><text:span text:style-name="T8">newSalt</text:span><text:span text:style-name="T7"> generates a salt (a portion of random data used as an additional input to a one-way function) by creating a 16-length byte array and then filling it with SecureRandom (a cryptographically strong random number generator.</text:span>).<text:span text:style-name="T7">This salt is then returned.</text:span></text:p>
      <text:p text:style-name="P10"><text:span text:style-name="T8">newHash</text:span><text:span text:style-name="T7"> takes a byte array as input, creates a MessageDigest instance (a class </text:span>that<text:span text:style-name="T7"> generates hashes from input), updates that instant with </text:span><text:span text:style-name="T8">newSalt</text:span><text:span text:style-name="T7">, and then computes the final hash by using the byte array input as the initial argument. This method is called when updating the passwor, or when trying to see if a certain byte array corresponds to the password.</text:span></text:p>
      <text:p text:style-name="P10"><text:span text:style-name="T10">Login</text:span><text:span text:style-name="T19"> checks to see i</text:span>f the hash of the byte array passed as an argument corresponds to the stored hash.</text:p>
      <text:p text:style-name="P10"/>
      <text:p text:style-name="P10">All subclasses of <text:a xlink:type="simple" xlink:href="#_bcfs57gbowue" text:style-name="ListLabel_20_57" text:visited-style-name="ListLabel_20_57"><text:span text:style-name="T18">User</text:span></text:a>: <text:a xlink:type="simple" xlink:href="#_p6zfqihdhhd4" text:style-name="ListLabel_20_57" text:visited-style-name="ListLabel_20_57"><text:span text:style-name="T18">Admin</text:span></text:a><text:span text:style-name="T10">, </text:span><text:a xlink:type="simple" xlink:href="#_8rkycz954mt1" text:style-name="ListLabel_20_57" text:visited-style-name="ListLabel_20_57"><text:span text:style-name="T18">Faculty</text:span></text:a><text:span text:style-name="T10">, </text:span><text:a xlink:type="simple" xlink:href="#_nvyosh22n95z" text:style-name="ListLabel_20_57" text:visited-style-name="ListLabel_20_57"><text:span text:style-name="T18">Student</text:span></text:a>, add relevant attributes to the object. Importantly, the <text:a xlink:type="simple" xlink:href="#_p6zfqihdhhd4" text:style-name="ListLabel_20_57" text:visited-style-name="ListLabel_20_57"><text:span text:style-name="T18">Admin</text:span></text:a> class sets the user’s role to ADMIN during construction, ensuring that other parts of the program will identify that they have admin permissions. Whereas <text:a xlink:type="simple" xlink:href="#_nvyosh22n95z" text:style-name="ListLabel_20_57" text:visited-style-name="ListLabel_20_57"><text:span text:style-name="T18">Student</text:span></text:a> and<text:span text:style-name="T10"> </text:span><text:a xlink:type="simple" xlink:href="#_8rkycz954mt1" text:style-name="ListLabel_20_57" text:visited-style-name="ListLabel_20_57"><text:span text:style-name="T18">Faculty</text:span></text:a><text:span text:style-name="T10"> </text:span>have <text:span text:style-name="T10">roles</text:span> set to STUDENT and FACULTY respectively.</text:p>
      <text:p text:style-name="P1"/>
      <text:p text:style-name="Standard">get/set <text:span text:style-name="T10">String</text:span> ID</text:p>
      <text:p text:style-name="Standard"><text:soft-page-break/>get/set <text:span text:style-name="T10">String</text:span> fullName</text:p>
      <text:p text:style-name="Standard">get/set <text:span text:style-name="T10">String</text:span> email</text:p>
      <text:p text:style-name="Standard">get/set <text:span text:style-name="T10">String</text:span> username</text:p>
      <text:p text:style-name="Standard">get/set <text:a xlink:type="simple" xlink:href="#_r883q22k3qse" text:style-name="ListLabel_20_57" text:visited-style-name="ListLabel_20_57"><text:span text:style-name="T18">Role</text:span></text:a> role</text:p>
      <text:p text:style-name="Standard">set <text:span text:style-name="T10">byte[]</text:span> password</text:p>
      <text:p text:style-name="P10"/>
      <text:p text:style-name="P35"><text:bookmark text:name="_p6zfqihdhhd4"/><text:a xlink:type="simple" xlink:href="#_e7xd3ij0nzju" text:style-name="ListLabel_20_56" text:visited-style-name="ListLabel_20_56"><text:span text:style-name="T17">Admin</text:span></text:a></text:p>
      <text:p text:style-name="Standard"><text:a xlink:type="simple" xlink:href="#_p6zfqihdhhd4" text:style-name="ListLabel_20_57" text:visited-style-name="ListLabel_20_57"><text:span text:style-name="T18">Admin</text:span></text:a> extends <text:a xlink:type="simple" xlink:href="#_bcfs57gbowue" text:style-name="ListLabel_20_57" text:visited-style-name="ListLabel_20_57"><text:span text:style-name="T18">User</text:span></text:a></text:p>
      <text:p text:style-name="Standard">Represents an administrator with full permissions. In addition to basic user info, it may include additional details like office location. The role is set to ADMIN.</text:p>
      <text:p text:style-name="Standard"/>
      <text:p text:style-name="P35"><text:bookmark text:name="_8rkycz954mt1"/><text:a xlink:type="simple" xlink:href="#_e7xd3ij0nzju" text:style-name="ListLabel_20_56" text:visited-style-name="ListLabel_20_56"><text:span text:style-name="T17">Faculty</text:span></text:a></text:p>
      <text:p text:style-name="Standard"><text:a xlink:type="simple" xlink:href="#_8rkycz954mt1" text:style-name="ListLabel_20_57" text:visited-style-name="ListLabel_20_57"><text:span text:style-name="T18">Faculty</text:span></text:a> extends <text:a xlink:type="simple" xlink:href="#_bcfs57gbowue" text:style-name="ListLabel_20_57" text:visited-style-name="ListLabel_20_57"><text:span text:style-name="T18">User</text:span></text:a></text:p>
      <text:p text:style-name="Standard">Represents a faculty member with details such as degree, research interest, office location, and a list of courses offered. The role is set to FACULTY.</text:p>
      <text:p text:style-name="Standard"/>
      <text:p text:style-name="P1">get <text:span text:style-name="T10">String</text:span> degree;</text:p>
      <text:p text:style-name="P1">get <text:span text:style-name="T10">String</text:span> researchInterest;</text:p>
      <text:p text:style-name="P1">get <text:span text:style-name="T10">String</text:span> officeLocation;</text:p>
      <text:p text:style-name="P1">get <text:span text:style-name="T10">ArrayList</text:span>&lt;<text:span text:style-name="T10">String</text:span>&gt; coursesOffered;</text:p>
      <text:p text:style-name="P1"/>
      <text:p text:style-name="Heading_20_2"><text:bookmark text:name="_nvyosh22n95z"/><text:a xlink:type="simple" xlink:href="#_e7xd3ij0nzju" text:style-name="ListLabel_20_56" text:visited-style-name="ListLabel_20_56"><text:span text:style-name="T17">Student</text:span></text:a></text:p>
      <text:p text:style-name="Standard"><text:a xlink:type="simple" xlink:href="#_nvyosh22n95z" text:style-name="ListLabel_20_57" text:visited-style-name="ListLabel_20_57"><text:span text:style-name="T18">Student</text:span></text:a> extends <text:a xlink:type="simple" xlink:href="#_bcfs57gbowue" text:style-name="ListLabel_20_57" text:visited-style-name="ListLabel_20_57"><text:span text:style-name="T18">User</text:span></text:a></text:p>
      <text:p text:style-name="Standard"><text:soft-page-break/>Represents a student with extra details including address, telephone number, academic level, current semester, photo location, enrolled courses, thesis title, and progress. The role is set to STUDENT.</text:p>
      <text:p text:style-name="Standard"/>
      <text:p text:style-name="Standard">get <text:span text:style-name="T10">String</text:span> Address;</text:p>
      <text:p text:style-name="Standard">get <text:span text:style-name="T10">String</text:span> TelephoneNumber;</text:p>
      <text:p text:style-name="Standard">get <text:span text:style-name="T10">String</text:span> AcademicLevel;</text:p>
      <text:p text:style-name="Standard">get <text:span text:style-name="T10">String</text:span> CurrentSemester;</text:p>
      <text:p text:style-name="Standard">get <text:span text:style-name="T10">String</text:span> photoLocation;</text:p>
      <text:p text:style-name="Standard">get <text:span text:style-name="T10">ArrayList</text:span>&lt;<text:span text:style-name="T10">String</text:span>&gt; Courses;</text:p>
      <text:p text:style-name="Standard">get <text:span text:style-name="T10">String</text:span> ThesisTitle;</text:p>
      <text:p text:style-name="Standard">get <text:span text:style-name="T10">int</text:span> progress;</text:p>
      <text:p text:style-name="P10"/>
      <text:p text:style-name="P35"><text:bookmark text:name="_t2gdcl8xuwjl"/><text:a xlink:type="simple" xlink:href="#_e7xd3ij0nzju" text:style-name="ListLabel_20_56" text:visited-style-name="ListLabel_20_56"><text:span text:style-name="T17">ExcelService</text:span></text:a></text:p>
      <text:p text:style-name="P1"><text:a xlink:type="simple" xlink:href="#_t2gdcl8xuwjl" text:style-name="ListLabel_20_57" text:visited-style-name="ListLabel_20_57"><text:span text:style-name="T18">ExcelService</text:span></text:a></text:p>
      <text:p text:style-name="P1">does not extend Service, reads UMS_Data.xlsx</text:p>
      <text:p text:style-name="Standard"/>
      <text:p text:style-name="P35"><text:bookmark text:name="_kuw06oa5npgu"/><text:a xlink:type="simple" xlink:href="#_e7xd3ij0nzju" text:style-name="ListLabel_20_56" text:visited-style-name="ListLabel_20_56"><text:span text:style-name="T17">Service</text:span></text:a></text:p>
      <text:p text:style-name="P1"><text:a xlink:type="simple" xlink:href="#_kuw06oa5npgu" text:style-name="ListLabel_20_57" text:visited-style-name="ListLabel_20_57"><text:span text:style-name="T18">Service</text:span></text:a>&lt;<text:span text:style-name="T10">T</text:span> extends <text:a xlink:type="simple" xlink:href="#_dtksbu783q6s" text:style-name="ListLabel_20_57" text:visited-style-name="ListLabel_20_57"><text:span text:style-name="T18">Model</text:span></text:a>&gt;</text:p>
      <text:p text:style-name="P1">All subclasses of <text:a xlink:type="simple" xlink:href="#_kuw06oa5npgu" text:style-name="ListLabel_20_57" text:visited-style-name="ListLabel_20_57"><text:span text:style-name="T18">Service</text:span></text:a>: <text:a xlink:type="simple" xlink:href="#_itxucruqzlpi" text:style-name="ListLabel_20_57" text:visited-style-name="ListLabel_20_57"><text:span text:style-name="T18">CourseService</text:span></text:a>, <text:a xlink:type="simple" xlink:href="#_xcs08spo3xv7" text:style-name="ListLabel_20_57" text:visited-style-name="ListLabel_20_57"><text:span text:style-name="T18">EventService</text:span></text:a>, <text:a xlink:type="simple" xlink:href="#_vxp1o06ge9z4" text:style-name="ListLabel_20_57" text:visited-style-name="ListLabel_20_57"><text:span text:style-name="T18">SubjectService</text:span></text:a><text:span text:style-name="T10"> </text:span>and <text:a xlink:type="simple" xlink:href="#_593ykqpijqfr" text:style-name="ListLabel_20_57" text:visited-style-name="ListLabel_20_57"><text:span text:style-name="T18">UserService</text:span></text:a>.</text:p>
      <text:p text:style-name="P1">Superclass, holds associated Models</text:p>
      <text:p text:style-name="Standard">Generic base service class, providing common CRUD operations for any models in the model class</text:p>
      <text:p text:style-name="Standard"><text:span text:style-name="T10">List</text:span>&lt;<text:span text:style-name="T10">T</text:span>&gt; getAll()</text:p>
      <text:p text:style-name="Standard"><text:soft-page-break/><text:span text:style-name="T10">void</text:span> add(<text:span text:style-name="T10">T</text:span> thing)</text:p>
      <text:p text:style-name="Standard"><text:span text:style-name="T10">void</text:span> delete(<text:span text:style-name="T10">T</text:span> thing)</text:p>
      <text:p text:style-name="Standard"><text:span text:style-name="T10">void</text:span> update(<text:span text:style-name="T10">T</text:span> updated)</text:p>
      <text:p text:style-name="Standard"/>
      <text:p text:style-name="P35"><text:bookmark text:name="_itxucruqzlpi"/><text:a xlink:type="simple" xlink:href="#_e7xd3ij0nzju" text:style-name="ListLabel_20_56" text:visited-style-name="ListLabel_20_56"><text:span text:style-name="T17">CourseService</text:span></text:a></text:p>
      <text:p text:style-name="P1"><text:a xlink:type="simple" xlink:href="#_itxucruqzlpi" text:style-name="ListLabel_20_57" text:visited-style-name="ListLabel_20_57"><text:span text:style-name="T18">CourseService</text:span></text:a><text:span text:style-name="T10"> </text:span>extends <text:a xlink:type="simple" xlink:href="#_kuw06oa5npgu" text:style-name="ListLabel_20_57" text:visited-style-name="ListLabel_20_57"><text:span text:style-name="T18">Service</text:span></text:a>&lt;<text:a xlink:type="simple" xlink:href="#_317sd7c6hob4" text:style-name="ListLabel_20_57" text:visited-style-name="ListLabel_20_57"><text:span text:style-name="T18">Course</text:span></text:a>&gt;</text:p>
      <text:p text:style-name="P1">holds Courses</text:p>
      <text:p text:style-name="P1">Manages Course objects by loading data through ExcelService and providing CRUD functions. It integrates with CourseEditActions and the CourseManagement view.</text:p>
      <text:p text:style-name="Standard"/>
      <text:p text:style-name="P35"><text:bookmark text:name="_xcs08spo3xv7"/><text:a xlink:type="simple" xlink:href="#_e7xd3ij0nzju" text:style-name="ListLabel_20_56" text:visited-style-name="ListLabel_20_56"><text:span text:style-name="T17">EventService</text:span></text:a></text:p>
      <text:p text:style-name="Standard"><text:a xlink:type="simple" xlink:href="#_xcs08spo3xv7" text:style-name="ListLabel_20_57" text:visited-style-name="ListLabel_20_57"><text:span text:style-name="T18">EventService</text:span></text:a><text:span text:style-name="T10"> </text:span>extends <text:a xlink:type="simple" xlink:href="#_kuw06oa5npgu" text:style-name="ListLabel_20_57" text:visited-style-name="ListLabel_20_57"><text:span text:style-name="T18">Service</text:span></text:a>&lt;<text:a xlink:type="simple" xlink:href="#_51yov5vp1y84" text:style-name="ListLabel_20_57" text:visited-style-name="ListLabel_20_57"><text:span text:style-name="T18">Event</text:span></text:a>&gt;</text:p>
      <text:p text:style-name="P1">holds Events</text:p>
      <text:p text:style-name="P1">Manages Event objects by loading data through ExcelService and providing CRUD functions. It integrates with EventEditActions and the EventManagement view.</text:p>
      <text:p text:style-name="Standard"/>
      <text:p text:style-name="P35"><text:bookmark text:name="_vxp1o06ge9z4"/><text:a xlink:type="simple" xlink:href="#_e7xd3ij0nzju" text:style-name="ListLabel_20_56" text:visited-style-name="ListLabel_20_56"><text:span text:style-name="T17">SubjectService</text:span></text:a></text:p>
      <text:p text:style-name="Standard"><text:a xlink:type="simple" xlink:href="#_vxp1o06ge9z4" text:style-name="ListLabel_20_57" text:visited-style-name="ListLabel_20_57"><text:span text:style-name="T18">SubjectService</text:span></text:a><text:span text:style-name="T10"> </text:span>extends <text:a xlink:type="simple" xlink:href="#_kuw06oa5npgu" text:style-name="ListLabel_20_57" text:visited-style-name="ListLabel_20_57"><text:span text:style-name="T18">Service</text:span></text:a>&lt;<text:a xlink:type="simple" xlink:href="#_e5qu73y6aza9" text:style-name="ListLabel_20_57" text:visited-style-name="ListLabel_20_57"><text:span text:style-name="T18">Subject</text:span></text:a>&gt;</text:p>
      <text:p text:style-name="P1">holds Subjects</text:p>
      <text:p text:style-name="P1">Manages Subject objects by retrieving data from ExcelService and supporting editing and deletion through SubjectEditActions and SubjectManagement.</text:p>
      <text:p text:style-name="Standard"/>
      <text:p text:style-name="P35"><text:bookmark text:name="_593ykqpijqfr"/><text:a xlink:type="simple" xlink:href="#_e7xd3ij0nzju" text:style-name="ListLabel_20_56" text:visited-style-name="ListLabel_20_56"><text:span text:style-name="T17">UserService</text:span></text:a></text:p>
      <text:p text:style-name="Standard"><text:a xlink:type="simple" xlink:href="#_593ykqpijqfr" text:style-name="ListLabel_20_57" text:visited-style-name="ListLabel_20_57"><text:span text:style-name="T18">UserService</text:span></text:a><text:span text:style-name="T10"> </text:span>extends <text:a xlink:type="simple" xlink:href="#_kuw06oa5npgu" text:style-name="ListLabel_20_57" text:visited-style-name="ListLabel_20_57"><text:span text:style-name="T18">Service</text:span></text:a>&lt;<text:a xlink:type="simple" xlink:href="#_bcfs57gbowue" text:style-name="ListLabel_20_57" text:visited-style-name="ListLabel_20_57"><text:span text:style-name="T18">User</text:span></text:a>&gt;</text:p>
      <text:p text:style-name="P1"><text:soft-page-break/>holds Users</text:p>
      <text:p text:style-name="P1">Manages User objects. It is initially populated with sample users (Admin, Faculty, Student, and a generic User) to support authentication and role-based access.</text:p>
      <text:p text:style-name="P1"/>
      <text:p text:style-name="P37"><text:bookmark text:name="_r883q22k3qse"/><text:a xlink:type="simple" xlink:href="#_e7xd3ij0nzju" text:style-name="ListLabel_20_56" text:visited-style-name="ListLabel_20_56"><text:span text:style-name="T17">Role</text:span></text:a></text:p>
      <text:p text:style-name="P1"><text:a xlink:type="simple" xlink:href="#_r883q22k3qse" text:style-name="ListLabel_20_57" text:visited-style-name="ListLabel_20_57"><text:span text:style-name="T18">Role</text:span></text:a></text:p>
      <text:p text:style-name="P1">Used across application to enforce access controls</text:p>
      <text:p text:style-name="P1">enum [ADMIN, FACULTY, STUDENT, USER].</text:p>
      <text:p text:style-name="Standard"/>
      <text:p text:style-name="P35"><text:bookmark text:name="_ggs8cyccskr"/><text:a xlink:type="simple" xlink:href="#_e7xd3ij0nzju" text:style-name="ListLabel_20_56" text:visited-style-name="ListLabel_20_56"><text:span text:style-name="T17">Launcher</text:span></text:a></text:p>
      <text:p text:style-name="P1"><text:a xlink:type="simple" xlink:href="#_ggs8cyccskr" text:style-name="ListLabel_20_57" text:visited-style-name="ListLabel_20_57"><text:span text:style-name="T18">Launcher</text:span></text:a></text:p>
      <text:p text:style-name="P1">The main class.</text:p>
      <text:p text:style-name="P1"><text:a xlink:type="simple" xlink:href="#_ggs8cyccskr" text:style-name="ListLabel_20_57" text:visited-style-name="ListLabel_20_57"><text:span text:style-name="T18">Launcher</text:span></text:a> just calls <text:a xlink:type="simple" xlink:href="#_wn2ikl8aco5t" text:style-name="ListLabel_20_57" text:visited-style-name="ListLabel_20_57"><text:span text:style-name="T18">MainApp</text:span></text:a>.launch.</text:p>
      <text:p text:style-name="P1"/>
      <text:p text:style-name="P35"><text:bookmark text:name="_wn2ikl8aco5t"/><text:a xlink:type="simple" xlink:href="#_e7xd3ij0nzju" text:style-name="ListLabel_20_56" text:visited-style-name="ListLabel_20_56"><text:span text:style-name="T17">MainApp</text:span></text:a></text:p>
      <text:p text:style-name="P1"><text:a xlink:type="simple" xlink:href="#_wn2ikl8aco5t" text:style-name="ListLabel_20_57" text:visited-style-name="ListLabel_20_57"><text:span text:style-name="T18">MainApp</text:span></text:a> Extends <text:span text:style-name="T10">Application</text:span></text:p>
      <text:p text:style-name="P1">Creates all services, controls <text:a xlink:type="simple" xlink:href="#_7rsk26726bzr" text:style-name="ListLabel_20_57" text:visited-style-name="ListLabel_20_57"><text:span text:style-name="T18">MainLayout</text:span></text:a>/<text:a xlink:type="simple" xlink:href="#_1rce9ay60xh" text:style-name="ListLabel_20_57" text:visited-style-name="ListLabel_20_57"><text:span text:style-name="T18">LoginScreen</text:span></text:a> switching, and loads the <text:s/>stylesheet.</text:p>
      <text:p text:style-name="P1"/>
      <text:p text:style-name="Standard"><text:a xlink:type="simple" xlink:href="#_bcfs57gbowue" text:style-name="ListLabel_20_57" text:visited-style-name="ListLabel_20_57"><text:span text:style-name="T18">User</text:span></text:a> user;</text:p>
      <text:p text:style-name="Standard"><text:span text:style-name="T10">Stage</text:span> stage;</text:p>
      <text:p text:style-name="Standard">get <text:a xlink:type="simple" xlink:href="#_t2gdcl8xuwjl" text:style-name="ListLabel_20_57" text:visited-style-name="ListLabel_20_57"><text:span text:style-name="T18">ExcelService</text:span></text:a> excelService;</text:p>
      <text:p text:style-name="Standard">get <text:a xlink:type="simple" xlink:href="#_vxp1o06ge9z4" text:style-name="ListLabel_20_57" text:visited-style-name="ListLabel_20_57"><text:span text:style-name="T18">SubjectService</text:span></text:a> subjectService;</text:p>
      <text:p text:style-name="Standard">get <text:a xlink:type="simple" xlink:href="#_itxucruqzlpi" text:style-name="ListLabel_20_57" text:visited-style-name="ListLabel_20_57"><text:span text:style-name="T18">CourseService</text:span></text:a> courseService;</text:p>
      <text:p text:style-name="Standard">get <text:a xlink:type="simple" xlink:href="#_xcs08spo3xv7" text:style-name="ListLabel_20_57" text:visited-style-name="ListLabel_20_57"><text:span text:style-name="T18">EventService</text:span></text:a> eventService;</text:p>
      <text:p text:style-name="Standard">get <text:a xlink:type="simple" xlink:href="#_593ykqpijqfr" text:style-name="ListLabel_20_57" text:visited-style-name="ListLabel_20_57"><text:span text:style-name="T18">UserService</text:span></text:a> user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line-height="115%" fo:background-color="#ffffff" fo:padding="0in" fo:border="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7pt" fo:font-weight="bold" style:font-size-asian="17pt" style:font-weight-asian="bold" style:font-size-complex="17pt"/>
    </style:style>
    <style:style style:name="Heading_20_2" style:display-name="Heading 2" style:family="paragraph" style:parent-style-name="normal" style:next-style-name="Standard" style:default-outline-level="" style:class="text">
      <style:paragraph-properties fo:keep-together="always"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ff0000" fo:font-size="13pt" style:font-size-asian="13pt" style:font-size-complex="13pt"/>
    </style:style>
    <style:style style:name="Heading_20_4" style:display-name="Heading 4" style:family="paragraph" style:parent-style-name="normal" style:next-style-name="Standard" style:default-outline-level="" style:class="text">
      <style:paragraph-properties fo:keep-together="always" fo:keep-with-next="always"/>
      <style:text-properties fo:color="#ff0000" fo:font-size="13pt" style:font-size-asian="13pt" style:font-size-complex="13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3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3pt" style:text-underline-style="none"/>
    </style:style>
    <style:style style:name="ListLabel_20_29" style:display-name="ListLabel 29" style:family="text">
      <style:text-properties fo:font-size="13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3pt" style:text-underline-style="none"/>
    </style:style>
    <style:style style:name="ListLabel_20_38" style:display-name="ListLabel 38" style:family="text">
      <style:text-properties fo:font-size="13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6" style:display-name="ListLabel 56" style:family="text">
      <style:text-properties style:text-underline-style="solid" style:text-underline-width="auto" style:text-underline-color="font-color"/>
    </style:style>
    <style:style style:name="ListLabel_20_57" style:display-name="ListLabel 57" style:family="text">
      <style:text-properties style:text-underline-style="solid" style:text-underline-width="auto" style:text-underline-color="font-color" fo:font-weight="bold" style:font-weight-asian="bold"/>
    </style:style>
    <style:style style:name="ListLabel_20_58" style:display-name="ListLabel 58" style:family="text">
      <style:text-properties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27" meta:paragraph-count="337" meta:word-count="2929" meta:character-count="20974" meta:non-whitespace-character-count="18363"/>
    <meta:generator>LibreOfficeDev/6.0.5.2$Linux_X86_64 LibreOffice_project/</meta:generator>
  </office:meta>
</office:document-meta>
</file>